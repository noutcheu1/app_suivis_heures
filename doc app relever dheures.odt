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2000001C039A28494957F0AFD.png" manifest:media-type="image/png"/>
  <manifest:file-entry manifest:full-path="Pictures/10000000000003670000021F88D29B00432B19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1.402cm" table:align="left"/>
    </style:style>
    <style:style style:name="Tableau1.A" style:family="table-column">
      <style:table-column-properties style:column-width="4.394cm"/>
    </style:style>
    <style:style style:name="Tableau1.B" style:family="table-column">
      <style:table-column-properties style:column-width="1.603cm"/>
    </style:style>
    <style:style style:name="Tableau1.C" style:family="table-column">
      <style:table-column-properties style:column-width="1.909cm"/>
    </style:style>
    <style:style style:name="Tableau1.D" style:family="table-column">
      <style:table-column-properties style:column-width="1.699cm"/>
    </style:style>
    <style:style style:name="Tableau1.E" style:family="table-column">
      <style:table-column-properties style:column-width="1.79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1cm" style:rel-column-width="2835*"/>
    </style:style>
    <style:style style:name="Tableau3.B" style:family="table-column">
      <style:table-column-properties style:column-width="5.997cm" style:rel-column-width="3400*"/>
    </style:style>
    <style:style style:name="Tableau3.C" style:family="table-column">
      <style:table-column-properties style:column-width="6.003cm" style:rel-column-width="3403*"/>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001cm" style:rel-column-width="30843*"/>
    </style:style>
    <style:style style:name="Tableau4.B" style:family="table-column">
      <style:table-column-properties style:column-width="8.999cm" style:rel-column-width="34692*"/>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001cm" style:rel-column-width="30843*"/>
    </style:style>
    <style:style style:name="Tableau5.B" style:family="table-column">
      <style:table-column-properties style:column-width="8.999cm" style:rel-column-width="3469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001cm" style:rel-column-width="30843*"/>
    </style:style>
    <style:style style:name="Tableau6.B" style:family="table-column">
      <style:table-column-properties style:column-width="8.999cm" style:rel-column-width="34692*"/>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6cf7"/>
    </style:style>
    <style:style style:name="P2" style:family="paragraph" style:parent-style-name="Standard">
      <style:text-properties officeooo:paragraph-rsid="0012524c"/>
    </style:style>
    <style:style style:name="P3" style:family="paragraph" style:parent-style-name="Standard">
      <style:text-properties officeooo:rsid="0012524c" officeooo:paragraph-rsid="0012524c"/>
    </style:style>
    <style:style style:name="P4" style:family="paragraph" style:parent-style-name="Standard">
      <style:text-properties fo:font-size="8pt" style:font-size-asian="8pt" style:font-size-complex="8pt"/>
    </style:style>
    <style:style style:name="P5" style:family="paragraph" style:parent-style-name="Table_20_Contents">
      <style:text-properties fo:font-size="8pt" style:font-size-asian="8pt" style:font-size-complex="8pt"/>
    </style:style>
    <style:style style:name="P6" style:family="paragraph" style:parent-style-name="Standard">
      <style:text-properties officeooo:paragraph-rsid="0013ee45"/>
    </style:style>
    <style:style style:name="P7" style:family="paragraph" style:parent-style-name="Standard">
      <style:text-properties officeooo:paragraph-rsid="0014e9f9"/>
    </style:style>
    <style:style style:name="P8" style:family="paragraph" style:parent-style-name="Table_20_Contents">
      <style:text-properties officeooo:paragraph-rsid="0014e9f9"/>
    </style:style>
    <style:style style:name="P9" style:family="paragraph" style:parent-style-name="Standard">
      <style:text-properties fo:font-size="20pt" fo:font-weight="bold" officeooo:paragraph-rsid="00073a45" style:font-size-asian="20pt" style:font-weight-asian="bold" style:font-size-complex="20pt" style:font-weight-complex="bold"/>
    </style:style>
    <style:style style:name="P10" style:family="paragraph" style:parent-style-name="Standard">
      <style:text-properties officeooo:paragraph-rsid="0027a56e"/>
    </style:style>
    <style:style style:name="P11" style:family="paragraph" style:parent-style-name="Table_20_Contents">
      <style:text-properties officeooo:paragraph-rsid="0027a56e"/>
    </style:style>
    <style:style style:name="P12" style:family="paragraph" style:parent-style-name="Text_20_body">
      <style:text-properties fo:font-size="15pt" fo:font-weight="bold" style:font-size-asian="15pt" style:font-weight-asian="bold" style:font-size-complex="15pt" style:font-weight-complex="bold"/>
    </style:style>
    <style:style style:name="P13" style:family="paragraph" style:parent-style-name="Table_20_Contents">
      <style:paragraph-properties fo:text-align="center" style:justify-single-word="false"/>
      <style:text-properties fo:font-size="15pt" fo:font-weight="bold" officeooo:rsid="000e6335" officeooo:paragraph-rsid="000e6335" style:font-size-asian="15pt" style:font-weight-asian="bold" style:font-size-complex="15pt" style:font-weight-complex="bold"/>
    </style:style>
    <style:style style:name="P14" style:family="paragraph" style:parent-style-name="Table_20_Contents">
      <style:paragraph-properties fo:text-align="center" style:justify-single-word="false"/>
      <style:text-properties fo:font-size="15pt" fo:font-weight="bold" officeooo:rsid="000f1ea0" officeooo:paragraph-rsid="000f1ea0" style:font-size-asian="15pt" style:font-weight-asian="bold" style:font-size-complex="15pt" style:font-weight-complex="bold"/>
    </style:style>
    <style:style style:name="P15" style:family="paragraph" style:parent-style-name="Table_20_Contents">
      <style:paragraph-properties fo:text-align="center" style:justify-single-word="false"/>
      <style:text-properties fo:font-size="15pt" fo:font-weight="bold" officeooo:paragraph-rsid="001057ad" style:font-size-asian="15pt" style:font-weight-asian="bold" style:font-size-complex="15pt" style:font-weight-complex="bold"/>
    </style:style>
    <style:style style:name="P16" style:family="paragraph" style:parent-style-name="Text_20_body">
      <style:text-properties officeooo:paragraph-rsid="0024659f"/>
    </style:style>
    <style:style style:name="P17" style:family="paragraph" style:parent-style-name="Table_20_Contents">
      <style:text-properties officeooo:rsid="000b557b" officeooo:paragraph-rsid="000b557b"/>
    </style:style>
    <style:style style:name="P18" style:family="paragraph" style:parent-style-name="Table_20_Contents">
      <style:paragraph-properties fo:text-align="center" style:justify-single-word="false"/>
      <style:text-properties officeooo:rsid="000b557b" officeooo:paragraph-rsid="000b557b"/>
    </style:style>
    <style:style style:name="P19" style:family="paragraph" style:parent-style-name="Table_20_Contents">
      <style:text-properties officeooo:rsid="0013ee45" officeooo:paragraph-rsid="0013ee45"/>
    </style:style>
    <style:style style:name="P20" style:family="paragraph" style:parent-style-name="Table_20_Contents">
      <style:paragraph-properties fo:margin-left="0cm" fo:margin-right="0cm" fo:text-align="center" style:justify-single-word="false" fo:orphans="2" fo:widows="2" fo:text-indent="0cm" style:auto-text-indent="false"/>
      <style:text-properties fo:color="#000000" loext:opacity="100%" fo:font-weight="bold" style:font-weight-asian="bold" style:font-weight-complex="bold"/>
    </style:style>
    <style:style style:name="P21" style:family="paragraph" style:parent-style-name="Table_20_Contents">
      <style:paragraph-properties fo:margin-left="0cm" fo:margin-right="0cm" fo:text-align="center" style:justify-single-word="false" fo:orphans="2" fo:widows="2" fo:text-indent="0cm" style:auto-text-indent="false"/>
      <style:text-properties fo:color="#000000" loext:opacity="100%" fo:font-weight="bold" officeooo:paragraph-rsid="000b557b" style:font-weight-asian="bold" style:font-weight-complex="bold"/>
    </style:style>
    <style:style style:name="P22" style:family="paragraph" style:parent-style-name="Standard">
      <style:text-properties officeooo:paragraph-rsid="002be4d4"/>
    </style:style>
    <style:style style:name="T1" style:family="text">
      <style:text-properties fo:font-size="20pt" fo:font-weight="bold" officeooo:rsid="000b5228" style:font-size-asian="20pt" style:font-weight-asian="bold" style:font-size-complex="20pt" style:font-weight-complex="bold"/>
    </style:style>
    <style:style style:name="T2" style:family="text">
      <style:text-properties fo:font-size="20pt" fo:font-weight="bold" officeooo:rsid="000c6cf7" style:font-size-asian="20pt" style:font-weight-asian="bold" style:font-size-complex="20pt" style:font-weight-complex="bold"/>
    </style:style>
    <style:style style:name="T3" style:family="text">
      <style:text-properties officeooo:rsid="00091994"/>
    </style:style>
    <style:style style:name="T4" style:family="text">
      <style:text-properties officeooo:rsid="000b5228"/>
    </style:style>
    <style:style style:name="T5" style:family="text">
      <style:text-properties fo:font-variant="normal" fo:text-transform="none" fo:letter-spacing="normal"/>
    </style:style>
    <style:style style:name="T6"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12524c" style:text-blinking="false" fo:background-color="transparent" loext:char-shading-value="0"/>
    </style:style>
    <style:style style:name="T8" style:family="text">
      <style:text-properties officeooo:rsid="000c6cf7"/>
    </style:style>
    <style:style style:name="T9" style:family="text">
      <style:text-properties officeooo:rsid="000f1ea0"/>
    </style:style>
    <style:style style:name="T10" style:family="text">
      <style:text-properties officeooo:rsid="001057ad"/>
    </style:style>
    <style:style style:name="T11" style:family="text">
      <style:text-properties fo:font-size="15pt" fo:font-weight="bold" officeooo:rsid="000c6cf7" style:font-size-asian="15pt" style:font-weight-asian="bold" style:font-size-complex="15pt" style:font-weight-complex="bold"/>
    </style:style>
    <style:style style:name="T12" style:family="text">
      <style:text-properties fo:font-size="15pt" fo:font-weight="bold" officeooo:rsid="0012524c" style:font-size-asian="15pt" style:font-weight-asian="bold" style:font-size-complex="15pt" style:font-weight-complex="bold"/>
    </style:style>
    <style:style style:name="T13" style:family="text">
      <style:text-properties fo:font-size="15pt" fo:font-weight="bold" officeooo:rsid="0013ee45" style:font-size-asian="15pt" style:font-weight-asian="bold" style:font-size-complex="15pt" style:font-weight-complex="bold"/>
    </style:style>
    <style:style style:name="T14" style:family="text">
      <style:text-properties fo:font-size="15pt" fo:font-weight="bold" officeooo:rsid="0014e9f9" style:font-size-asian="15pt" style:font-weight-asian="bold" style:font-size-complex="15pt" style:font-weight-complex="bold"/>
    </style:style>
    <style:style style:name="T15" style:family="text">
      <style:text-properties fo:font-size="15pt" fo:font-weight="bold" officeooo:rsid="001896aa" style:font-size-asian="15pt" style:font-weight-asian="bold" style:font-size-complex="15pt" style:font-weight-complex="bold"/>
    </style:style>
    <style:style style:name="T16" style:family="text">
      <style:text-properties fo:font-size="15pt" fo:font-weight="bold" officeooo:rsid="00192dd8" style:font-size-asian="15pt" style:font-weight-asian="bold" style:font-size-complex="15pt" style:font-weight-complex="bold"/>
    </style:style>
    <style:style style:name="T17" style:family="text">
      <style:text-properties officeooo:rsid="0012524c"/>
    </style:style>
    <style:style style:name="T18" style:family="text">
      <style:text-properties fo:background-color="transparent" loext:char-shading-value="0"/>
    </style:style>
    <style:style style:name="T19" style:family="text">
      <style:text-properties style:font-name="Linux Biolinum G"/>
    </style:style>
    <style:style style:name="T20" style:family="text">
      <style:text-properties officeooo:rsid="0013ee45"/>
    </style:style>
    <style:style style:name="T21" style:family="text">
      <style:text-properties fo:background-color="#ffff00" loext:char-shading-value="0"/>
    </style:style>
    <style:style style:name="T22" style:family="text">
      <style:text-properties officeooo:rsid="0014e9f9"/>
    </style:style>
    <style:style style:name="T23" style:family="text">
      <style:text-properties style:font-name="Liberation Serif" fo:font-size="12pt" fo:font-weight="normal" officeooo:rsid="001896aa" style:font-size-asian="12pt" style:font-weight-asian="normal" style:font-size-complex="12pt" style:font-weight-complex="normal"/>
    </style:style>
    <style:style style:name="T24" style:family="text">
      <style:text-properties style:font-name="Liberation Serif" fo:font-size="12pt" fo:font-weight="normal" officeooo:rsid="0018c1f0" style:font-size-asian="12pt" style:font-weight-asian="normal" style:font-size-complex="12pt" style:font-weight-complex="normal"/>
    </style:style>
    <style:style style:name="T25" style:family="text">
      <style:text-properties style:font-name="Liberation Serif" fo:font-size="12pt" fo:font-weight="normal" officeooo:rsid="001a09a1" style:font-size-asian="12pt" style:font-weight-asian="normal" style:font-size-complex="12pt" style:font-weight-complex="normal"/>
    </style:style>
    <style:style style:name="T26" style:family="text">
      <style:text-properties style:font-name="Liberation Serif" fo:font-size="12pt" fo:font-weight="normal" officeooo:rsid="001abe44" style:font-size-asian="12pt" style:font-weight-asian="normal" style:font-size-complex="12pt" style:font-weight-complex="normal"/>
    </style:style>
    <style:style style:name="T27" style:family="text">
      <style:text-properties style:font-name="Liberation Serif" fo:font-size="12pt" fo:font-style="italic" fo:font-weight="normal" officeooo:rsid="001896aa" style:font-size-asian="12pt" style:font-style-asian="italic" style:font-weight-asian="normal" style:font-size-complex="12pt" style:font-style-complex="italic" style:font-weight-complex="normal"/>
    </style:style>
    <style:style style:name="T28" style:family="text">
      <style:text-properties style:font-name="Liberation Serif" fo:font-size="12pt" fo:font-style="italic" fo:font-weight="normal" officeooo:rsid="0018c1f0" style:font-size-asian="12pt" style:font-style-asian="italic" style:font-weight-asian="normal" style:font-size-complex="12pt" style:font-style-complex="italic" style:font-weight-complex="normal"/>
    </style:style>
    <style:style style:name="T29" style:family="text">
      <style:text-properties style:font-name="Liberation Serif" fo:font-size="12pt" fo:font-style="italic" fo:font-weight="normal" officeooo:rsid="001a09a1" style:font-size-asian="12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27a56e" style:font-size-asian="12pt" style:font-style-asian="italic" style:font-weight-asian="normal" style:font-size-complex="12pt" style:font-style-complex="italic" style:font-weight-complex="normal"/>
    </style:style>
    <style:style style:name="T31" style:family="text">
      <style:text-properties style:font-name="Liberation Serif" fo:font-size="12pt" fo:font-style="italic" fo:font-weight="normal" officeooo:rsid="002be4d4" style:font-size-asian="12pt" style:font-style-asian="italic" style:font-weight-asian="normal" style:font-size-complex="12pt" style:font-style-complex="italic" style:font-weight-complex="normal"/>
    </style:style>
    <style:style style:name="T32" style:family="text">
      <style:text-properties style:font-name="Liberation Serif" fo:font-size="12pt" fo:font-style="italic" fo:font-weight="normal" officeooo:rsid="002280d1" style:font-size-asian="12pt" style:font-style-asian="italic" style:font-weight-asian="normal" style:font-size-complex="12pt" style:font-style-complex="italic" style:font-weight-complex="normal"/>
    </style:style>
    <style:style style:name="T33" style:family="text">
      <style:text-properties style:font-name="Liberation Serif" fo:font-size="12pt" fo:font-style="italic" fo:font-weight="normal" officeooo:rsid="002d1ba6" style:font-size-asian="12pt" style:font-style-asian="italic" style:font-weight-asian="normal" style:font-size-complex="12pt" style:font-style-complex="italic" style:font-weight-complex="normal"/>
    </style:style>
    <style:style style:name="T34" style:family="text">
      <style:text-properties style:font-name="Liberation Serif" fo:font-size="12pt" fo:font-style="italic" fo:font-weight="normal" officeooo:rsid="002db0f1" style:font-size-asian="12pt" style:font-style-asian="italic" style:font-weight-asian="normal" style:font-size-complex="12pt" style:font-style-complex="italic" style:font-weight-complex="normal"/>
    </style:style>
    <style:style style:name="T35" style:family="text">
      <style:text-properties style:font-name="Liberation Serif" fo:font-size="12pt" fo:font-style="italic" fo:font-weight="normal" officeooo:rsid="00312c3d" style:font-size-asian="12pt" style:font-style-asian="italic" style:font-weight-asian="normal" style:font-size-complex="12pt" style:font-style-complex="italic" style:font-weight-complex="normal"/>
    </style:style>
    <style:style style:name="T36" style:family="text">
      <style:text-properties style:font-name="Liberation Serif" fo:font-size="12pt" fo:font-style="normal" fo:font-weight="normal" officeooo:rsid="001abe44"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203db8"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normal" fo:font-weight="normal" officeooo:rsid="002225eb"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fo:font-weight="normal" officeooo:rsid="002280d1"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fo:font-weight="normal" officeooo:rsid="0027a56e" style:font-size-asian="12pt" style:font-style-asian="normal" style:font-weight-asian="normal" style:font-size-complex="12pt" style:font-style-complex="normal" style:font-weight-complex="normal"/>
    </style:style>
    <style:style style:name="T41" style:family="text">
      <style:text-properties style:font-name="Liberation Serif" fo:font-size="15pt" fo:font-weight="bold" officeooo:rsid="001896aa" style:font-size-asian="15pt" style:font-weight-asian="bold" style:font-size-complex="15pt" style:font-weight-complex="bold"/>
    </style:style>
    <style:style style:name="T42" style:family="text">
      <style:text-properties style:font-name="Liberation Serif" fo:font-size="15pt" fo:font-weight="bold" officeooo:rsid="001a09a1" style:font-size-asian="15pt" style:font-weight-asian="bold" style:font-size-complex="15pt" style:font-weight-complex="bold"/>
    </style:style>
    <style:style style:name="T43" style:family="text">
      <style:text-properties officeooo:rsid="001896aa"/>
    </style:style>
    <style:style style:name="T44" style:family="text">
      <style:text-properties officeooo:rsid="00192dd8"/>
    </style:style>
    <style:style style:name="T45" style:family="text">
      <style:text-properties officeooo:rsid="0024659f"/>
    </style:style>
    <style:style style:name="T46" style:family="text">
      <style:text-properties officeooo:rsid="0027a56e"/>
    </style:style>
    <style:style style:name="T47" style:family="text">
      <style:text-properties fo:font-style="italic" officeooo:rsid="0029edf4"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onctionnalités<text:line-break/></text:p>
      <text:p text:style-name="Text_20_body"><text:tab/>les intervenants et les familles peuvent s’inscrire et se connecter<text:line-break/>intervenant avec numéro de sécurité sociale<text:line-break/>famille avec un de leurs codes client (PGE ou PM)<text:line-break/>admin aller dans le type intervenant login : 9.99.99.99.999.999.99 mdp : admin</text:p>
      <text:p text:style-name="Text_20_body"><text:tab/>option mot de passe oublié saisie du login pour cliquer sur le bouton<text:line-break/>et ça leur envoie un email avec un code temporaire pour changer le mot de passe<text:line-break/><text:span text:style-name="T47">conseil, pour le moment le mails s’envoie pas aux familles et intervenants grâce a la ligne 62 de mdpOublier.php </text:span></text:p>
      <text:p text:style-name="P12"><text:line-break/>Intervenants</text:p>
      <text:p text:style-name="Text_20_body"><text:tab/>ajoute les heures auxquelles il a travaillé<text:line-break/>a une limite de jours modifiable dans le fichier app-suivis-heures\configuration.json (nbrJourSaisie)<text:line-break/>a une liste des familles dans son planning<text:line-break/>après avoir validé il y a une confirmation supplémentaire</text:p>
      <text:p text:style-name="Text_20_body"><text:tab/>peut voir ces relevés d’heures mensuels<text:line-break/>peut ajouter les heures travaillées en dehors de la structure<text:line-break/>peut signer le relevé (mois actuel et mois précédent)<text:line-break/>peut télécharger ces relevés mensuels en pdf</text:p>
      <text:p text:style-name="P12"><text:line-break/><text:span text:style-name="T3">F</text:span>amilles</text:p>
      <text:p text:style-name="Text_20_body"><text:tab/>elle peut valider les heures de travail saisies par l’intervenant<text:line-break/>si les heures ne lui vont pas elle peut faire un signalement<text:line-break/>affiche les heures signalées dans un deuxième tableau</text:p>
      <text:p text:style-name="Text_20_body"><text:tab/>elle peut voir ces récapitulatifs d’heures mensuels<text:line-break/>peut voir les jours avec des heures à valider<text:line-break/>peut voir son estimation de facture<text:line-break/>peut choisir son moyen de paiement<text:line-break/>peut donner son avis sur les interventions et signer<text:line-break/>peut télécharger ces récapitulatifs mensuels en pdf</text:p>
      <text:p text:style-name="P12"><text:span text:style-name="T3"><text:line-break/>A</text:span>dmin</text:p>
      <text:p text:style-name="Text_20_body"><text:tab/>peut voir la liste des Intervenants et accéder au détail de chacun<text:line-break/>le profil affiche les informations de l’intervenant<text:line-break/>peut voir les heures travaillées saisies par l’intervenant (peut les modifier, les supprimer et en ajouter <text:span text:style-name="T20">sans limitation</text:span>)<text:line-break/>peut voir les relevés d’heures mensuels de l’intervenant (voir les km de trajet et télécharger en pdf)</text:p>
      <text:p text:style-name="Text_20_body"><text:soft-page-break/><text:tab/>peut voir un récapitulatif des heures saisies de chaque mois<text:line-break/>peut être téléchargé en csv</text:p>
      <text:p text:style-name="Text_20_body"><text:tab/>peut voir la préparation à la paie<text:line-break/>peut être téléchargé en csv</text:p>
      <text:p text:style-name="Text_20_body"><text:tab/>peut télécharger des fiches de relevé d’heures vierges<text:line-break/>télécharge une tranche de mois par défaut un an<text:line-break/>le téléchargement prend quelques secondes car il doit générer toutes les pages</text:p>
      <text:p text:style-name="Text_20_body"><text:tab/>peut voir la liste des familles et accéder au détail de chacune<text:line-break/>le profil affiche les informations de la famille<text:line-break/>peut voir les récapitulatifs d’heures mensuels de la famille (ajouter et modifier une exception de facturation et télécharger en pdf)</text:p>
      <text:p text:style-name="Text_20_body"><text:tab/>peut voir les signalements des familles sur une déclaration d’un intervenant<text:line-break/>peut modifier les déclarations qui posent problème (la famille doit valider après)<text:line-break/>peut voir les anciens signalements des familles</text:p>
      <text:p text:style-name="Text_20_body"><text:tab/>liste des exceptions de facturation<text:line-break/>peut en ajouter à n’importe quelle famille<text:line-break/>peut modifier une exception de facturation (envoie directement sur le récapitulatif d’heures mensuel correspondant)</text:p>
      <text:p text:style-name="P16"><text:tab/>modifier les tarifications (pas terminé)<text:line-break/>modifier le nombre de tranches de taux horaire de garde d’enfants dans le fichier app-suivis-heures\configuration.json (nbrPalierTarifGE)<text:line-break/>modifier le nombre de tranches de taux horaire de <text:span text:style-name="T45">ménage</text:span> dans le fichier app-suivis-heures\configuration.json (nbrPalierTarif<text:span text:style-name="T45">M</text:span>)<text:line-break/>les tarifs sont utilisés <text:span text:style-name="T9">ainsi</text:span> dans les tarifs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1990625880224">
          <table:table-cell table:style-name="Tableau1.A1" office:value-type="string">
            <text:p text:style-name="P17">DATE du récapitulatif d’heures de la famille</text:p>
          </table:table-cell>
          <table:table-cell table:style-name="Tableau1.B1" office:value-type="string">
            <text:p text:style-name="P18">10/2025</text:p>
          </table:table-cell>
          <table:table-cell table:style-name="Tableau1.B1" office:value-type="string">
            <text:p text:style-name="P18">11/2025</text:p>
          </table:table-cell>
          <table:table-cell table:style-name="Tableau1.B1" office:value-type="string">
            <text:p text:style-name="P18">01/2026</text:p>
          </table:table-cell>
          <table:table-cell table:style-name="Tableau1.E1" office:value-type="string">
            <text:p text:style-name="P18">06/2026</text:p>
          </table:table-cell>
        </table:table-row>
        <table:table-row table:style-name="TableLine1990625870160">
          <table:table-cell table:style-name="Tableau1.A3" office:value-type="string">
            <text:p text:style-name="Table_20_Contents"/>
          </table:table-cell>
          <table:table-cell table:style-name="Tableau1.B2" office:value-type="string">
            <text:p text:style-name="P20"><text:span text:style-name="T5">↓</text:span> <text:span text:style-name="T5">↓</text:span> <text:span text:style-name="T5">↓</text:span> </text:p>
          </table:table-cell>
          <table:table-cell table:style-name="Tableau1.B2" office:value-type="string">
            <text:p text:style-name="P21"><text:span text:style-name="T5">↓</text:span> <text:span text:style-name="T5">↓</text:span> <text:span text:style-name="T5">↓</text:span> </text:p>
          </table:table-cell>
          <table:table-cell table:style-name="Tableau1.B2" office:value-type="string">
            <text:p text:style-name="P21"><text:span text:style-name="T5">↓</text:span> <text:span text:style-name="T5">↓</text:span> <text:span text:style-name="T5">↓</text:span> </text:p>
          </table:table-cell>
          <table:table-cell table:style-name="Tableau1.E2" office:value-type="string">
            <text:p text:style-name="P21"><text:span text:style-name="T5">↓</text:span> <text:span text:style-name="T5">↓</text:span> <text:span text:style-name="T5">↓</text:span> </text:p>
          </table:table-cell>
        </table:table-row>
        <table:table-row table:style-name="TableLine1990625877232">
          <table:table-cell table:style-name="Tableau1.A3" office:value-type="string">
            <text:p text:style-name="P17">DATE de la tarification enregistr<text:span text:style-name="T9">ée</text:span></text:p>
          </table:table-cell>
          <table:table-cell table:style-name="Tableau1.B2" office:value-type="string">
            <text:p text:style-name="P18">09/2025</text:p>
          </table:table-cell>
          <table:table-cell table:style-name="Tableau1.B2" office:value-type="string">
            <text:p text:style-name="P18">11/2025</text:p>
          </table:table-cell>
          <table:table-cell table:style-name="Tableau1.B2" office:value-type="string">
            <text:p text:style-name="P18">11/2025</text:p>
          </table:table-cell>
          <table:table-cell table:style-name="Tableau1.E2" office:value-type="string">
            <text:p text:style-name="P18">04/2026</text:p>
          </table:table-cell>
        </table:table-row>
      </table:table>
      <text:p text:style-name="P1"><draw:frame draw:style-name="fr2" draw:name="Image1" text:anchor-type="as-char" svg:y="-1.757cm" svg:width="8.229cm" svg:height="3.309cm" draw:z-index="0"><draw:image xlink:href="Pictures/1000000000000462000001C039A28494957F0AFD.png" xlink:type="simple" xlink:show="embed" xlink:actuate="onLoad" draw:mime-type="image/png"/></draw:frame><text:line-break/><text:line-break/><text:span text:style-name="T1">Installation</text:span><text:span text:style-name="T4"><text:line-break/><text:line-break/></text:span><text:span text:style-name="T11">Nouvelle table </text:span><text:span text:style-name="T12">de la </text:span><text:span text:style-name="T11">base de donnes</text:span><text:span text:style-name="T8"><text:line-break/></text:span></text:p>
      <table:table table:name="Tableau2" table:style-name="Tableau2">
        <table:table-column table:style-name="Tableau2.A" table:number-columns-repeated="3"/>
        <table:table-row table:style-name="TableLine1990625881312">
          <table:table-cell table:style-name="Tableau2.A1" office:value-type="string">
            <text:p text:style-name="P13">user2</text:p>
          </table:table-cell>
          <table:table-cell table:style-name="Tableau2.A1" office:value-type="string">
            <text:p text:style-name="P14">tarifs2</text:p>
          </table:table-cell>
          <table:table-cell table:style-name="Tableau2.C1" office:value-type="string">
            <text:p text:style-name="P15">relevemensuelinter</text:p>
          </table:table-cell>
        </table:table-row>
        <table:table-row table:style-name="TableLine1990625882128">
          <table:table-cell table:style-name="Tableau2.A2" office:value-type="string">
            <text:p text:style-name="P5">CREATE TABLE `users2` (<text:line-break/><text:soft-page-break/> <text:s/>`identifiant` varchar(21) NOT NULL,<text:line-break/> <text:s/>`mdp` varchar(255) NOT NULL<text:line-break/>) ENGINE=InnoDB DEFAULT CHARSET=utf8mb4;<text:line-break/><text:line-break/>INSERT INTO `users2` (`identifiant`, `mdp`) VALUES<text:line-break/>('9.99.99.99.999.999.99', '$2y$10$TeklSxuN91pAS7wiiUbuweakFvvsvNIg91XrCTAmY7vrPIkPC4WpS');<text:line-break/><text:line-break/>ALTER TABLE `users2`<text:line-break/> <text:s/>ADD PRIMARY KEY (`identifiant`);</text:p>
          </table:table-cell>
          <table:table-cell table:style-name="Tableau2.A2" office:value-type="string">
            <text:p text:style-name="P5">CREATE TABLE `tarifs2` (<text:line-break/><text:soft-page-break/> <text:s/>`id` int(15) NOT NULL,<text:line-break/> <text:s/>`alheureGE` text NOT NULL,<text:line-break/> <text:s/>`alheureM` text DEFAULT NULL,<text:line-break/> <text:s/>`fraisGestion` text NOT NULL,<text:line-break/> <text:s/>`parIntervention` decimal(5,2) NOT NULL,<text:line-break/> <text:s/>`maxParIntervention` decimal(5,2) NOT NULL,<text:line-break/> <text:s/>`KMenfants` decimal(5,2) NOT NULL,<text:line-break/> <text:s/>`abonnement` decimal(5,2) NOT NULL,<text:line-break/> <text:s/>`dateDebut` varchar(7) NOT NULL<text:line-break/>) ENGINE=InnoDB DEFAULT CHARSET=utf8mb4;<text:line-break/><text:line-break/>INSERT INTO `tarifs2` (`id`, `alheureGE`, `alheureM`, `fraisGestion`, `parIntervention`, `maxParIntervention`, `KMenfants`, `abonnement`, `dateDebut`) VALUES (2, '[ [\"$h &gt;= 16\",\"V\"], [\"$h &lt; 16 &amp;&amp; $h &gt;= 13\",27.00], [\"$h &lt; 13 &amp;&amp; $h &gt;= 10\",30.00], [\"$h &lt; 10 &amp;&amp; $h &gt;= 7\",32.00], [\"$h &lt; 7\",35.00] ]', '[ [\"$h &gt;= 0\",\"V\"], [\"$h &lt; 0\",0.00] ]', '[ [\"$age &lt; 6\", \"$h &lt; 19\",25.00], [\"$age &gt;= 6\", \"$h &lt; 8\",15.00] ]', '1.50', '15.00', '0.35', '2.00', '2025-07');<text:line-break/><text:line-break/>ALTER TABLE `tarifs2`<text:line-break/> <text:s/>ADD PRIMARY KEY (`id`);<text:line-break/><text:line-break/>ALTER TABLE `tarifs2`<text:line-break/> <text:s/>MODIFY `id` int(15) NOT NULL AUTO_INCREMENT, AUTO_INCREMENT=<text:span text:style-name="T45">2</text:span>;</text:p>
          </table:table-cell>
          <table:table-cell table:style-name="Tableau2.C2" office:value-type="string">
            <text:p text:style-name="P5">CREATE TABLE `relevemensuelinter` (<text:line-break/><text:soft-page-break/> <text:s/>`moisannee` varchar(7) NOT NULL,<text:line-break/> <text:s/>`numInter` int(5) NOT NULL,<text:line-break/> <text:s/>`typePresta` varchar(4) NOT NULL,<text:line-break/> <text:s/>`heureDehors` time DEFAULT NULL,<text:line-break/> <text:s/>`heureDehorsAjouterLe` datetime DEFAULT NULL,<text:line-break/> <text:s/>`signer` tinyint(1) NOT NULL DEFAULT 0,<text:line-break/> <text:s/>`signerLe` datetime DEFAULT NULL<text:line-break/>) ENGINE=InnoDB DEFAULT CHARSET=utf8mb4;<text:line-break/><text:line-break/>ALTER TABLE `relevemensuelinter`<text:line-break/> <text:s/>ADD PRIMARY KEY (`moisannee`,`numInter`,`typePresta`);</text:p>
          </table:table-cell>
        </table:table-row>
        <table:table-row table:style-name="TableLine1990625882944">
          <table:table-cell table:style-name="Tableau2.A2" office:value-type="string">
            <text:p text:style-name="P15">relevemensuelfam</text:p>
          </table:table-cell>
          <table:table-cell table:style-name="Tableau2.A2" office:value-type="string">
            <text:p text:style-name="P15">horaireinter</text:p>
          </table:table-cell>
          <table:table-cell table:style-name="Tableau2.C2" office:value-type="string">
            <text:p text:style-name="Table_20_Contents"/>
          </table:table-cell>
        </table:table-row>
        <table:table-row table:style-name="TableLine1990625884576">
          <table:table-cell table:style-name="Tableau2.A2" office:value-type="string">
            <text:p text:style-name="P5">CREATE TABLE `relevemensuelfam` (<text:line-break/> <text:s/>`numFam` varchar(10) NOT NULL,<text:line-break/> <text:s/>`moisannee` varchar(7) NOT NULL,<text:line-break/> <text:s/>`typePresta` varchar(4) NOT NULL,<text:line-break/> <text:s/>`typeRèglement` varchar(15) DEFAULT NULL,<text:line-break/> <text:s/>`numChèque` varchar(15) DEFAULT NULL,<text:line-break/> <text:s/>`nbrCESU` int(11) DEFAULT NULL,<text:line-break/> <text:s/>`montantPrincipal` decimal(5,2) DEFAULT NULL,<text:line-break/> <text:s/>`complementCESU` varchar(15) DEFAULT NULL,<text:line-break/> <text:s/>`montantComplement` decimal(5,2) DEFAULT NULL,<text:line-break/> <text:s/>`libelerSupl` text DEFAULT NULL,<text:line-break/> <text:s/>`montantSupl` decimal(5,2) DEFAULT NULL,<text:line-break/> <text:s/>`avisPonctualite` int(11) DEFAULT NULL,<text:line-break/> <text:s/>`avisReguRela` int(11) DEFAULT NULL,<text:line-break/> <text:s/>`avisRespectHo` int(11) DEFAULT NULL,<text:line-break/> <text:s/>`avisQualiteTr` int(11) DEFAULT NULL,<text:line-break/> <text:s/>`signerLe` datetime <text:span text:style-name="T19">DEFAULT</text:span> NULL<text:line-break/>) ENGINE=InnoDB DEFAULT CHARSET=utf8mb4;<text:line-break/><text:line-break/>ALTER TABLE `relevemensuelfam`<text:line-break/> <text:s/>ADD PRIMARY KEY (`numFam`,`moisannee`,`typePresta`);</text:p>
          </table:table-cell>
          <table:table-cell table:style-name="Tableau2.A2" office:value-type="string">
            <text:p text:style-name="P5">CREATE TABLE `horaireinter` (<text:line-break/> <text:s/>`id` int(15) NOT NULL,<text:line-break/> <text:s/>`numFam` varchar(10) DEFAULT NULL,<text:line-break/> <text:s/>`nomFam` varchar(50) NOT NULL,<text:line-break/> <text:s/>`numInter` int(5) NOT NULL,<text:line-break/> <text:s/>`datePresta` date NOT NULL,<text:line-break/> <text:s/>`heureDebutPresta` time NOT NULL,<text:line-break/> <text:s/>`heureFinPresta` time NOT NULL,<text:line-break/> <text:s/>`typePresta` varchar(4) NOT NULL,<text:line-break/> <text:s/>`kmAvecEnfant` decimal(5,1) DEFAULT NULL,<text:line-break/> <text:s/>`ajouterLe` datetime NOT NULL,<text:line-break/> <text:s/>`modifierLe` datetime DEFAULT NULL,<text:line-break/> <text:s/>`desactiver` tinyint(1) NOT NULL DEFAULT 0,<text:line-break/> <text:s/>`validerFam` tinyint(1) NOT NULL DEFAULT 0,<text:line-break/> <text:s/>`validerLe` datetime DEFAULT NULL,<text:line-break/> <text:s/>`remarque` text DEFAULT NULL,<text:line-break/> <text:s/>`remarqueLe` datetime DEFAULT NULL<text:line-break/>) ENGINE=InnoDB DEFAULT CHARSET=utf8mb4;<text:line-break/><text:line-break/>ALTER TABLE `horaireinter`<text:line-break/> <text:s/>ADD PRIMARY KEY (`id`);<text:line-break/><text:line-break/>ALTER TABLE `horaireinter`<text:line-break/> <text:s/>MODIFY `id` int(15) NOT NULL AUTO_INCREMENT, AUTO_INCREMENT=<text:span text:style-name="T10">1</text:span>;</text:p>
          </table:table-cell>
          <table:table-cell table:style-name="Tableau2.C2" office:value-type="string">
            <text:p text:style-name="P5"/>
          </table:table-cell>
        </table:table-row>
      </table:table>
      <text:p text:style-name="P2"><text:span text:style-name="T8"><text:line-break/></text:span><text:span text:style-name="T11">Configuration xampp </text:span><text:span text:style-name="T4"><text:line-break/><text:line-break/></text:span><text:span text:style-name="T17">pour l’envoie de mail xampp doit être configurer :</text:span></text:p>
      <table:table table:name="Tableau3" table:style-name="Tableau3">
        <table:table-column table:style-name="Tableau3.A"/>
        <table:table-column table:style-name="Tableau3.B"/>
        <table:table-column table:style-name="Tableau3.C"/>
        <table:table-row table:style-name="TableLine1988875640784">
          <table:table-cell table:style-name="Tableau3.A1" office:value-type="string">
            <text:p text:style-name="Standard"><text:bookmark text:name="docs-internal-guid-4ce74413-7fff-62b2-86e4-f4914c84a286"/><text:span text:style-name="T6">php.ini</text:span> </text:p>
          </table:table-cell>
          <table:table-cell table:style-name="Tableau3.A1" office:value-type="string">
            <text:p text:style-name="Standard"><text:bookmark text:name="docs-internal-guid-37124846-7fff-2867-93ce-cec299e9bae1"/><text:span text:style-name="T6">sendmail.ini</text:span> </text:p>
          </table:table-cell>
          <table:table-cell table:style-name="Tableau3.C1" office:value-type="string">
            <text:p text:style-name="P3">L’email norely</text:p>
          </table:table-cell>
        </table:table-row>
        <table:table-row table:style-name="TableLine1988875642688">
          <table:table-cell table:style-name="Tableau3.A2" office:value-type="string">
            <text:p text:style-name="P5"><text:bookmark text:name="docs-internal-guid-937f5392-7fff-b498-1cce-8360480b0ebb"/>[mail function]</text:p>
            <text:p text:style-name="P5">SMTP = smtp.gmail.com</text:p>
            <text:p text:style-name="P5">smtp_port = 587</text:p>
            <text:p text:style-name="P5">sendmail_from = <text:soft-page-break/>noreplychaudoudoux@gmail.com</text:p>
            <text:p text:style-name="P5">sendmail_path = "\"C:\xampp\sendmail\sendmail.exe\" -t"</text:p>
          </table:table-cell>
          <table:table-cell table:style-name="Tableau3.A2" office:value-type="string">
            <text:p text:style-name="P5"><text:bookmark text:name="docs-internal-guid-fe4cc5c0-7fff-6988-cf72-0d586e2a3f5a"/>[sendmail]</text:p>
            <text:p text:style-name="P5"/>
            <text:p text:style-name="P5">smtp_server=smtp.gmail.com</text:p>
            <text:p text:style-name="P5">smtp_port=587</text:p>
            <text:p text:style-name="P5"><text:soft-page-break/>smtp_ssl=tls</text:p>
            <text:p text:style-name="P5"/>
            <text:p text:style-name="P5">auth_username=noreplychaudoudoux@gmail.com</text:p>
            <text:p text:style-name="P5">auth_password=maiq shik xooh sbzw</text:p>
            <text:p text:style-name="P5">force_sender=noreplychaudoudoux@gmail.com</text:p>
            <text:p text:style-name="P5"/>
            <text:p text:style-name="P5">; options de log (optionnel)</text:p>
            <text:p text:style-name="P5">error_logfile=error.log</text:p>
            <text:p text:style-name="P5">debug_logfile=debug.log</text:p>
          </table:table-cell>
          <table:table-cell table:style-name="Tableau3.C2" office:value-type="string">
            <text:p text:style-name="P4"><text:bookmark text:name="docs-internal-guid-450c4749-7fff-d47a-e6b5-6aa1867fd302"/><text:span text:style-name="T6">noreplychaudoudoux@gmail.com<text:line-break/></text:span><text:span text:style-name="T7">mdp : </text:span><text:span text:style-name="T6">chaudoudoux35</text:span> </text:p>
            <text:p text:style-name="P5"/>
          </table:table-cell>
        </table:table-row>
      </table:table>
      <text:p text:style-name="P6"><text:span text:style-name="T2"><text:line-break/>Tutoriel</text:span><text:span text:style-name="T4"><text:line-break/><text:line-break/></text:span><text:span text:style-name="T13">Délais de saisie autoris</text:span><text:span text:style-name="T16">é</text:span><text:span text:style-name="T20"><text:line-break/><text:line-break/></text:span><text:span text:style-name="T22">U</text:span><text:span text:style-name="T20">n intervenant peu</text:span><text:span text:style-name="T44">t</text:span><text:span text:style-name="T20"> saisir </text:span><text:span text:style-name="T44">s</text:span><text:span text:style-name="T20">es heures travaillé</text:span><text:span text:style-name="T44">es</text:span><text:span text:style-name="T20"> x jours après le jour </text:span><text:span text:style-name="T44">à</text:span><text:span text:style-name="T20"> déclarer</text:span></text:p>
      <table:table table:name="Tableau4" table:style-name="Tableau4">
        <table:table-column table:style-name="Tableau4.A"/>
        <table:table-column table:style-name="Tableau4.B"/>
        <table:table-row table:style-name="TableLine1990625899808">
          <table:table-cell table:style-name="Tableau4.A1" office:value-type="string">
            <text:p text:style-name="P6"><text:span text:style-name="T20">pour modifier le nombre de jour</text:span><text:span text:style-name="T44">s</text:span><text:span text:style-name="T20"> aller dans le dossier de l’application et ouvrir le fichier suivant (configuration.json)</text:span></text:p>
          </table:table-cell>
          <table:table-cell table:style-name="Tableau4.B1" office:value-type="string">
            <text:p text:style-name="P19">Dans le fichier, vous trouve<text:span text:style-name="T44">rez</text:span> ceci, modifier <text:span text:style-name="T44">c</text:span>e nombre pour changer le délai de saisie autoris<text:span text:style-name="T44">é</text:span></text:p>
          </table:table-cell>
        </table:table-row>
        <table:table-row table:style-name="TableLine1990625896000">
          <table:table-cell table:style-name="Tableau4.A2" office:value-type="string">
            <text:p text:style-name="Table_20_Contents"><draw:frame draw:style-name="fr1" draw:name="Image2" text:anchor-type="char" svg:x="0.097cm" svg:y="0.046cm" svg:width="5.988cm" svg:height="3.734cm" draw:z-index="1"><draw:image xlink:href="Pictures/10000000000003670000021F88D29B00432B19B4.png" xlink:type="simple" xlink:show="embed" xlink:actuate="onLoad" draw:mime-type="image/png"/></draw:frame></text:p>
          </table:table-cell>
          <table:table-cell table:style-name="Tableau4.B2" office:value-type="string">
            <text:p text:style-name="Table_20_Contents">{</text:p>
            <text:p text:style-name="Table_20_Contents"><text:s text:c="2"/>"nbrJourSaisie": <text:span text:style-name="T21">7</text:span>,</text:p>
            <text:p text:style-name="Table_20_Contents"><text:s text:c="2"/>"nbrPalierTarifGE": 4,</text:p>
            <text:p text:style-name="Table_20_Contents"><text:s text:c="2"/>"nbrPalierTarifM": 0</text:p>
            <text:p text:style-name="Table_20_Contents">}</text:p>
          </table:table-cell>
        </table:table-row>
      </table:table>
      <text:p text:style-name="P7"><text:span text:style-name="T4"><text:line-break/></text:span><text:span text:style-name="T14">Nbr de tranche</text:span><text:span text:style-name="T16">s</text:span><text:span text:style-name="T14"> horaire</text:span><text:span text:style-name="T16">s</text:span><text:span text:style-name="T14"> de tarification </text:span><text:span text:style-name="T22"><text:line-break/><text:line-break/>en administrateur on peu</text:span><text:span text:style-name="T44">t</text:span><text:span text:style-name="T22"> changer les tarifs. </text:span><text:span text:style-name="T44">L</text:span><text:span text:style-name="T22">e taux horaire en garde d’enfants est r</text:span><text:span text:style-name="T44">é</text:span><text:span text:style-name="T22">parti en plusieurs tranche</text:span><text:span text:style-name="T44">s.</text:span><text:span text:style-name="T22"> </text:span><text:span text:style-name="T44">I</text:span><text:span text:style-name="T22">l est possible de changer le nombre de tranche</text:span><text:span text:style-name="T44">s</text:span><text:span text:style-name="T4"><text:line-break/></text:span></text:p>
      <table:table table:name="Tableau5" table:style-name="Tableau5">
        <table:table-column table:style-name="Tableau5.A"/>
        <table:table-column table:style-name="Tableau5.B"/>
        <table:table-row table:style-name="TableLine1990625903616">
          <table:table-cell table:style-name="Tableau5.A1" office:value-type="string">
            <text:p text:style-name="P7"><text:span text:style-name="T20">pour modifier le nombre de </text:span><text:span text:style-name="T22">tranche</text:span><text:span text:style-name="T44">s</text:span><text:span text:style-name="T20"> aller dans le dossier de l’application et ouvrir le fichier suivant (configuration.json)</text:span></text:p>
          </table:table-cell>
          <table:table-cell table:style-name="Tableau5.B1" office:value-type="string">
            <text:p text:style-name="P8"><text:span text:style-name="T20">Dans le fichier, vous trouver</text:span><text:span text:style-name="T44">ez</text:span><text:span text:style-name="T20"> ceci, modifier </text:span><text:span text:style-name="T44">c</text:span><text:span text:style-name="T20">e nombre pour changer le </text:span><text:span text:style-name="T22">nombre de tranche</text:span><text:span text:style-name="T44">s</text:span><text:span text:style-name="T22"> horaire</text:span><text:span text:style-name="T44">s garde d’enfants</text:span></text:p>
          </table:table-cell>
        </table:table-row>
        <table:table-row table:style-name="TableLine1990625903888">
          <table:table-cell table:style-name="Tableau5.A2" office:value-type="string">
            <text:p text:style-name="P8"><draw:frame draw:style-name="fr1" draw:name="Image3" text:anchor-type="char" svg:x="0.097cm" svg:y="0.046cm" svg:width="5.988cm" svg:height="3.734cm" draw:z-index="2"><draw:image xlink:href="Pictures/10000000000003670000021F88D29B00432B19B4.png" xlink:type="simple" xlink:show="embed" xlink:actuate="onLoad" draw:mime-type="image/png"/></draw:frame></text:p>
          </table:table-cell>
          <table:table-cell table:style-name="Tableau5.B2" office:value-type="string">
            <text:p text:style-name="P8">{</text:p>
            <text:p text:style-name="P8"><text:s text:c="2"/>"nbrJourSaisie": <text:span text:style-name="T18">7</text:span>,</text:p>
            <text:p text:style-name="P8"><text:s text:c="2"/>"nbrPalierTarifGE": <text:span text:style-name="T21">4</text:span>,</text:p>
            <text:p text:style-name="P8"><text:s text:c="2"/>"nbrPalierTarifM": 0</text:p>
            <text:p text:style-name="P8">}</text:p>
          </table:table-cell>
        </table:table-row>
      </table:table>
      <text:p text:style-name="P10"><text:span text:style-name="T4"><text:line-break/></text:span><text:span text:style-name="T44">L</text:span><text:span text:style-name="T22">e taux horaire en </text:span><text:span text:style-name="T46">ménage</text:span><text:span text:style-name="T22"> </text:span><text:span text:style-name="T46">n’</text:span><text:span text:style-name="T22">est </text:span><text:span text:style-name="T46">pas encore</text:span><text:span text:style-name="T22"> r</text:span><text:span text:style-name="T44">é</text:span><text:span text:style-name="T22">parti en plusieurs tranche</text:span><text:span text:style-name="T44">s, </text:span><text:span text:style-name="T46">mais</text:span><text:span text:style-name="T22"> </text:span><text:span text:style-name="T46">i</text:span><text:span text:style-name="T22">l est possible </text:span><text:span text:style-name="T46">d’ajouter</text:span><text:span text:style-name="T22"> tranche</text:span><text:span text:style-name="T44">s </text:span><text:span text:style-name="T46">horaire comme pour la garde d’enfants</text:span><text:span text:style-name="T4"><text:line-break/></text:span></text:p>
      <table:table table:name="Tableau6" table:style-name="Tableau6">
        <table:table-column table:style-name="Tableau6.A"/>
        <table:table-column table:style-name="Tableau6.B"/>
        <table:table-row table:style-name="TableLine1990625887024">
          <table:table-cell table:style-name="Tableau6.A1" office:value-type="string">
            <text:p text:style-name="P10"><text:span text:style-name="T20">pour modifier le nombre de </text:span><text:span text:style-name="T22">tranche</text:span><text:span text:style-name="T44">s</text:span><text:span text:style-name="T20"> aller dans le dossier de l’application et ouvrir le fichier suivant (configuration.json)</text:span></text:p>
          </table:table-cell>
          <table:table-cell table:style-name="Tableau6.B1" office:value-type="string">
            <text:p text:style-name="P11"><text:span text:style-name="T20">Dans le fichier, vous trouver</text:span><text:span text:style-name="T44">ez</text:span><text:span text:style-name="T20"> ceci, modifier </text:span><text:span text:style-name="T44">c</text:span><text:span text:style-name="T20">e nombre pour changer le </text:span><text:span text:style-name="T22">nombre de tranche</text:span><text:span text:style-name="T44">s</text:span><text:span text:style-name="T22"> horaire</text:span><text:span text:style-name="T44">s </text:span><text:span text:style-name="T46">menage</text:span></text:p>
          </table:table-cell>
        </table:table-row>
        <text:soft-page-break/>
        <table:table-row table:style-name="TableLine1990625891376">
          <table:table-cell table:style-name="Tableau6.A2" office:value-type="string">
            <text:p text:style-name="P11"><draw:frame draw:style-name="fr1" draw:name="Image4" text:anchor-type="char" svg:x="0.097cm" svg:y="0.046cm" svg:width="5.988cm" svg:height="3.734cm" draw:z-index="3"><draw:image xlink:href="Pictures/10000000000003670000021F88D29B00432B19B4.png" xlink:type="simple" xlink:show="embed" xlink:actuate="onLoad" draw:mime-type="image/png"/></draw:frame></text:p>
          </table:table-cell>
          <table:table-cell table:style-name="Tableau6.B2" office:value-type="string">
            <text:p text:style-name="P11">{</text:p>
            <text:p text:style-name="P11"><text:s text:c="2"/>"nbrJourSaisie": <text:span text:style-name="T18">7</text:span>,</text:p>
            <text:p text:style-name="P11"><text:s text:c="2"/>"nbrPalierTarifGE": <text:span text:style-name="T18">4</text:span>,</text:p>
            <text:p text:style-name="P11"><text:s text:c="2"/>"nbrPalierTarifM": <text:span text:style-name="T21">0</text:span></text:p>
            <text:p text:style-name="P11">}</text:p>
          </table:table-cell>
        </table:table-row>
      </table:table>
      <text:p text:style-name="P10"><text:span text:style-name="T4"><text:line-break/><text:line-break/></text:span><text:span text:style-name="T1">A faire</text:span></text:p>
      <text:p text:style-name="P22"><text:line-break/><text:span text:style-name="T15">A améliorer</text:span><text:span text:style-name="T43"><text:line-break/></text:span><text:span text:style-name="T23"><text:line-break/>sur les fiches r</text:span><text:span text:style-name="T25">é</text:span><text:span text:style-name="T23">cap d’heures familles <text:line-break/>- le tarif taux horaire s’affiche uniquement après le 20 du mois <text:line-break/>- le tarif taux horaire si le nombre d’heures est supérieur </text:span><text:span text:style-name="T25">à</text:span><text:span text:style-name="T23"> 16h varie selon la famille. </text:span><text:span text:style-name="T25">L</text:span><text:span text:style-name="T23">e chiffre réel est dans un Microsoft </text:span><text:span text:style-name="T25">A</text:span><text:span text:style-name="T23">ccess (un outil proche d’une base de donné</text:span><text:span text:style-name="T25">es</text:span><text:span text:style-name="T23">)<text:line-break/></text:span><text:span text:style-name="T27">conseil, l’idée serai</text:span><text:span text:style-name="T29">t</text:span><text:span text:style-name="T27"> d’exporter le contenu de l’access </text:span><text:span text:style-name="T33">(une requête a était faite)</text:span><text:span text:style-name="T27"> pour l’importer dans la base de donn</text:span><text:span text:style-name="T29">ées</text:span><text:span text:style-name="T27"> manuellement </text:span><text:span text:style-name="T35">(j’ai tester sa ne voulait pas tout importe)</text:span><text:span text:style-name="T27">, </text:span><text:span text:style-name="T33">pour chaque relever mensuel </text:span><text:span text:style-name="T34">récupérer</text:span><text:span text:style-name="T33"> se tarif et </text:span><text:span text:style-name="T34">l’enregistrer</text:span><text:span text:style-name="T33"> dans la base </text:span><text:span text:style-name="T34">dans le relever mensuel.</text:span><text:span text:style-name="T27"><text:line-break/><text:line-break/></text:span><text:span text:style-name="T36">dans la fiche récap famille (en admin et en famille) améliorer le style CSS</text:span><text:span text:style-name="T23"><text:line-break/>- </text:span><text:span text:style-name="T26">en admin la partie « Frais / Remboursement »<text:line-break/>- en famille la partie « Questionnaire de satisfaction et signature »</text:span><text:span text:style-name="T23"><text:line-break/><text:line-break/></text:span><text:span text:style-name="T41">Nouvelle</text:span><text:span text:style-name="T42">s</text:span><text:span text:style-name="T41"> option</text:span><text:span text:style-name="T42">s</text:span><text:span text:style-name="T23"><text:line-break/><text:line-break/>les familles et les intervenants pourront ajouter leur date de vacances <text:line-break/>- </text:span><text:span text:style-name="T25">à</text:span><text:span text:style-name="T23"> voir mais les dates </text:span><text:span text:style-name="T24">pourrai</text:span><text:span text:style-name="T25">ent</text:span><text:span text:style-name="T23"> s’afficher dans les fiches relev</text:span><text:span text:style-name="T25">é</text:span><text:span text:style-name="T23"> </text:span><text:span text:style-name="T24">intervenant</text:span><text:span text:style-name="T23"> et r</text:span><text:span text:style-name="T25">é</text:span><text:span text:style-name="T23">cap </text:span><text:span text:style-name="T24">famille</text:span><text:span text:style-name="T23"><text:line-break/><text:line-break/></text:span><text:span text:style-name="T24">envoi automatique de mail de rappel de validation<text:line-break/>- pour les familles Garde d’enfants, envoyer un email pour rappeler a la famille de valider les horaires saisi</text:span><text:span text:style-name="T25">s</text:span><text:span text:style-name="T24"> par les intervenants tou</text:span><text:span text:style-name="T25">s</text:span><text:span text:style-name="T24"> les weekends et </text:span><text:span text:style-name="T25">à</text:span><text:span text:style-name="T24"> la fin du mois<text:line-break/>- pour les familles M</text:span><text:span text:style-name="T25">é</text:span><text:span text:style-name="T24">nage, envoyer un email pour rappeler </text:span><text:span text:style-name="T25">à</text:span><text:span text:style-name="T24"> la famille de valider les horaires saisi</text:span><text:span text:style-name="T25">s</text:span><text:span text:style-name="T24"> par les intervenants </text:span><text:span text:style-name="T25">à</text:span><text:span text:style-name="T24"> la fin du mois<text:line-break/></text:span><text:span text:style-name="T28">conseil, envoyer les mails seulement avec des heures </text:span><text:span text:style-name="T29">à</text:span><text:span text:style-name="T28"> valider <text:line-break/><text:line-break/></text:span><text:span text:style-name="T37">afficher </text:span><text:span text:style-name="T38">la liste d</text:span><text:span text:style-name="T37">es tarifs </text:span><text:span text:style-name="T38">enregistrer afficher </text:span><text:span text:style-name="T39">uniquement les derniers enregistrer de chaque mois<text:line-break/></text:span><text:span text:style-name="T31">conseil, </text:span><text:span text:style-name="T32">SELECT t.* FROM tarifs2 t JOIN ( SELECT dateDebut, MAX(id) AS max_id FROM tarifs2 GROUP BY dateDebut ) AS latest ON t.id = latest.max_id </text:span></text:p>
      <text:p text:style-name="P22"><text:span text:style-name="T39"><text:line-break/><text:line-break/></text:span><text:span text:style-name="T40">fiche vierge famille (la problématique du access doit être régler avant)<text:line-break/></text:span><text:span text:style-name="T30">conseil, les parties règlements par et questionnaire de satisfaction doive être comme avant. Deux ligne doive exister pour la tarification horaires une qui affiche le tarif du access et l’autre pour les tarif avec des tranches horair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4T13:38:22.812000000</meta:creation-date>
    <dc:date>2025-11-07T14:57:24.439000000</dc:date>
    <meta:editing-duration>PT4H26M19S</meta:editing-duration>
    <meta:editing-cycles>26</meta:editing-cycles>
    <meta:generator>LibreOffice/7.2.3.2$Windows_X86_64 LibreOffice_project/d166454616c1632304285822f9c83ce2e660fd92</meta:generator>
    <meta:document-statistic meta:table-count="6" meta:image-count="4" meta:object-count="0" meta:page-count="5" meta:paragraph-count="90" meta:word-count="1488" meta:character-count="10647" meta:non-whitespace-character-count="9050"/>
  </office:meta>
</office:document-meta>
</file>