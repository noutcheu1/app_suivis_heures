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1BE89000024E6000070A85212039B.svg" manifest:media-type="image/svg+xml"/>
  <manifest:file-entry manifest:full-path="Pictures/10000001000000EA00000197F4B797C5.png" manifest:media-type="image/png"/>
  <manifest:file-entry manifest:full-path="Pictures/1000B7C60000182F00002A11D2E1E439.svg" manifest:media-type="image/svg+xml"/>
  <manifest:file-entry manifest:full-path="Pictures/100000010000036400000216F714E550.png" manifest:media-type="image/png"/>
  <manifest:file-entry manifest:full-path="Pictures/10000001000001650000044212BC3BBE.png" manifest:media-type="image/png"/>
  <manifest:file-entry manifest:full-path="Pictures/1001A892000059B60000373112478B28.svg" manifest:media-type="image/svg+xml"/>
  <manifest:file-entry manifest:full-path="Pictures/100000010000015D00000150AC277B2C.png" manifest:media-type="image/png"/>
  <manifest:file-entry manifest:full-path="Pictures/10011A2D00002412000022BA04B81E6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Tableau2" style:family="table">
      <style:table-properties style:width="3.796cm" table:align="left"/>
    </style:style>
    <style:style style:name="Tableau2.A" style:family="table-column">
      <style:table-column-properties style:column-width="1.099cm"/>
    </style:style>
    <style:style style:name="Tableau2.B" style:family="table-column">
      <style:table-column-properties style:column-width="2.697cm"/>
    </style:style>
    <style:style style:name="Tableau2.A1" style:family="table-cell">
      <style:table-cell-properties fo:background-color="#ffd7d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fo:background-color="#fff5ce" fo:padding="0.097cm" fo:border-left="0.5pt solid #000000" fo:border-right="none" fo:border-top="none" fo:border-bottom="0.5pt solid #000000">
        <style:background-image/>
      </style:table-cell-properties>
    </style:style>
    <style:style style:name="Tableau2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4" style:family="table-cell">
      <style:table-cell-properties fo:background-color="#dde8cb" fo:padding="0.097cm" fo:border-left="0.5pt solid #000000" fo:border-right="none" fo:border-top="none" fo:border-bottom="0.5pt solid #000000">
        <style:background-image/>
      </style:table-cell-properties>
    </style:style>
    <style:style style:name="Tableau2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9.45cm" fo:margin-left="-1.646cm" table:align="left" style:may-break-between-rows="true" table:border-model="collapsing"/>
    </style:style>
    <style:style style:name="Tableau1.A" style:family="table-column">
      <style:table-column-properties style:column-width="0.947cm"/>
    </style:style>
    <style:style style:name="Tableau1.B" style:family="table-column">
      <style:table-column-properties style:column-width="4.186cm"/>
    </style:style>
    <style:style style:name="Tableau1.C" style:family="table-column">
      <style:table-column-properties style:column-width="8.807cm"/>
    </style:style>
    <style:style style:name="Tableau1.D" style:family="table-column">
      <style:table-column-properties style:column-width="3.593cm"/>
    </style:style>
    <style:style style:name="Tableau1.E" style:family="table-column">
      <style:table-column-properties style:column-width="1.917cm"/>
    </style:style>
    <style:style style:name="Tableau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au1.2" style:family="table-row">
      <style:table-row-properties fo:keep-together="auto"/>
    </style:style>
    <style:style style:name="Tableau1.A2" style:family="table-cell">
      <style:table-cell-properties fo:background-color="#dee6ef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A3" style:family="table-cell">
      <style:table-cell-properties fo:background-color="#dde8cb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A4" style:family="table-cell">
      <style:table-cell-properties fo:background-color="#b4c7dc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A6" style:family="table-cell">
      <style:table-cell-properties fo:background-color="#ffd8c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8" style:family="table-row">
      <style:table-row-properties style:min-row-height="0.915cm"/>
    </style:style>
    <style:style style:name="Tableau1.11" style:family="table-row">
      <style:table-row-properties style:min-row-height="1.266cm"/>
    </style:style>
    <style:style style:name="Tableau1.D11" style:family="table-cell" style:data-style-name="N10000">
      <style:table-cell-properties fo:background-color="#ffd8c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12" style:family="table-row">
      <style:table-row-properties style:min-row-height="1.893cm" fo:keep-together="auto"/>
    </style:style>
    <style:style style:name="Tableau1.A12" style:family="table-cell">
      <style:table-cell-properties fo:background-color="#ffd8ce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au1.B12" style:family="table-cell">
      <style:table-cell-properties fo:background-color="#ffd8ce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au1.C12" style:family="table-cell">
      <style:table-cell-properties fo:background-color="#ffd8ce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au1.D12" style:family="table-cell">
      <style:table-cell-properties fo:background-color="#ffd8ce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au1.E12" style:family="table-cell">
      <style:table-cell-properties fo:background-color="#ffd8ce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au1.13" style:family="table-row">
      <style:table-row-properties style:min-row-height="1.266cm" fo:keep-together="auto"/>
    </style:style>
    <style:style style:name="Tableau1.A1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B13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A1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A1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A1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A1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A18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au1.B18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 style:writing-mode="lr-tb"/>
    </style:style>
    <style:style style:name="Tableau3.A" style:family="table-column">
      <style:table-column-properties style:column-width="3.593cm" style:rel-column-width="13850*"/>
    </style:style>
    <style:style style:name="Tableau3.B" style:family="table-column">
      <style:table-column-properties style:column-width="13.407cm" style:rel-column-width="51685*"/>
    </style:style>
    <style:style style:name="Tableau3.A1" style:family="table-cell">
      <style:table-cell-properties fo:padding="0.097cm" fo:border-left="0.5pt solid #000000" fo:border-right="none" fo:border-top="0.5pt solid #000000" fo:border-bottom="none"/>
    </style:style>
    <style:style style:name="Tableau3.B1" style:family="table-cell">
      <style:table-cell-properties fo:padding="0.097cm" fo:border-left="none" fo:border-right="0.5pt solid #000000" fo:border-top="0.5pt solid #000000" fo:border-bottom="none"/>
    </style:style>
    <style:style style:name="Tableau3.A2" style:family="table-cell">
      <style:table-cell-properties fo:padding="0.097cm" fo:border-left="0.5pt solid #000000" fo:border-right="none" fo:border-top="none" fo:border-bottom="none"/>
    </style:style>
    <style:style style:name="Tableau3.B2" style:family="table-cell">
      <style:table-cell-properties fo:padding="0.097cm" fo:border-left="none" fo:border-right="0.5pt solid #000000" fo:border-top="none" fo:border-bottom="none"/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B3" style:family="table-cell">
      <style:table-cell-properties fo:padding="0.097cm" fo:border-left="none" fo:border-right="0.5pt solid #000000" fo:border-top="none" fo:border-bottom="0.5pt solid #000000"/>
    </style:style>
    <style:style style:name="Tableau5" style:family="table">
      <style:table-properties style:width="17cm" table:align="margins" style:writing-mode="lr-tb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7cm" table:align="margins" style:writing-mode="lr-tb"/>
    </style:style>
    <style:style style:name="Tableau6.A" style:family="table-column">
      <style:table-column-properties style:column-width="3.593cm" style:rel-column-width="13850*"/>
    </style:style>
    <style:style style:name="Tableau6.B" style:family="table-column">
      <style:table-column-properties style:column-width="13.407cm" style:rel-column-width="51685*"/>
    </style:style>
    <style:style style:name="Tableau6.A1" style:family="table-cell">
      <style:table-cell-properties fo:padding="0.097cm" fo:border-left="0.5pt solid #000000" fo:border-right="none" fo:border-top="0.5pt solid #000000" fo:border-bottom="none"/>
    </style:style>
    <style:style style:name="Tableau6.B1" style:family="table-cell">
      <style:table-cell-properties fo:padding="0.097cm" fo:border-left="none" fo:border-right="0.5pt solid #000000" fo:border-top="0.5pt solid #000000" fo:border-bottom="none"/>
    </style:style>
    <style:style style:name="Tableau6.A2" style:family="table-cell">
      <style:table-cell-properties fo:padding="0.097cm" fo:border-left="0.5pt solid #000000" fo:border-right="none" fo:border-top="none" fo:border-bottom="none"/>
    </style:style>
    <style:style style:name="Tableau6.B2" style:family="table-cell">
      <style:table-cell-properties fo:padding="0.097cm" fo:border-left="none" fo:border-right="0.5pt solid #000000" fo:border-top="none" fo:border-bottom="none"/>
    </style:style>
    <style:style style:name="Tableau6.3" style:family="table-row">
      <style:table-row-properties style:min-row-height="2.219cm"/>
    </style:style>
    <style:style style:name="Tableau6.A3" style:family="table-cell">
      <style:table-cell-properties fo:padding="0.097cm" fo:border-left="0.5pt solid #000000" fo:border-right="none" fo:border-top="none" fo:border-bottom="0.5pt solid #000000"/>
    </style:style>
    <style:style style:name="Tableau6.B3" style:family="table-cell">
      <style:table-cell-properties fo:padding="0.097cm" fo:border-left="none" fo:border-right="0.5pt solid #000000" fo:border-top="none" fo:border-bottom="0.5pt solid #000000"/>
    </style:style>
    <style:style style:name="Tableau8" style:family="table">
      <style:table-properties style:width="17cm" table:align="margins" style:writing-mode="lr-tb"/>
    </style:style>
    <style:style style:name="Tableau8.A" style:family="table-column">
      <style:table-column-properties style:column-width="3.593cm" style:rel-column-width="13850*"/>
    </style:style>
    <style:style style:name="Tableau8.B" style:family="table-column">
      <style:table-column-properties style:column-width="13.407cm" style:rel-column-width="51685*"/>
    </style:style>
    <style:style style:name="Tableau8.A1" style:family="table-cell">
      <style:table-cell-properties fo:padding="0.097cm" fo:border-left="0.5pt solid #000000" fo:border-right="none" fo:border-top="0.5pt solid #000000" fo:border-bottom="none"/>
    </style:style>
    <style:style style:name="Tableau8.B1" style:family="table-cell">
      <style:table-cell-properties fo:padding="0.097cm" fo:border-left="none" fo:border-right="0.5pt solid #000000" fo:border-top="0.5pt solid #000000" fo:border-bottom="none"/>
    </style:style>
    <style:style style:name="Tableau8.A2" style:family="table-cell">
      <style:table-cell-properties fo:padding="0.097cm" fo:border-left="0.5pt solid #000000" fo:border-right="none" fo:border-top="none" fo:border-bottom="none"/>
    </style:style>
    <style:style style:name="Tableau8.B2" style:family="table-cell">
      <style:table-cell-properties fo:padding="0.097cm" fo:border-left="none" fo:border-right="0.5pt solid #000000" fo:border-top="none" fo:border-bottom="none"/>
    </style:style>
    <style:style style:name="Tableau8.A3" style:family="table-cell">
      <style:table-cell-properties fo:padding="0.097cm" fo:border-left="0.5pt solid #000000" fo:border-right="none" fo:border-top="none" fo:border-bottom="0.5pt solid #000000"/>
    </style:style>
    <style:style style:name="Tableau8.B3" style:family="table-cell">
      <style:table-cell-properties fo:background-color="#002b36" fo:padding="0.097cm" fo:border-left="none" fo:border-right="0.5pt solid #000000" fo:border-top="none" fo:border-bottom="0.5pt solid #000000"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>
        <style:background-image/>
      </style:table-cell-properties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3.593cm" style:rel-column-width="13850*"/>
    </style:style>
    <style:style style:name="Tableau7.B" style:family="table-column">
      <style:table-column-properties style:column-width="13.407cm" style:rel-column-width="51685*"/>
    </style:style>
    <style:style style:name="Tableau7.A1" style:family="table-cell">
      <style:table-cell-properties fo:padding="0.097cm" fo:border-left="0.5pt solid #000000" fo:border-right="none" fo:border-top="0.5pt solid #000000" fo:border-bottom="none"/>
    </style:style>
    <style:style style:name="Tableau7.B1" style:family="table-cell">
      <style:table-cell-properties fo:padding="0.097cm" fo:border-left="none" fo:border-right="0.5pt solid #000000" fo:border-top="0.5pt solid #000000" fo:border-bottom="none"/>
    </style:style>
    <style:style style:name="Tableau7.A2" style:family="table-cell">
      <style:table-cell-properties fo:padding="0.097cm" fo:border-left="0.5pt solid #000000" fo:border-right="none" fo:border-top="none" fo:border-bottom="none"/>
    </style:style>
    <style:style style:name="Tableau7.B2" style:family="table-cell">
      <style:table-cell-properties fo:padding="0.097cm" fo:border-left="none" fo:border-right="0.5pt solid #000000" fo:border-top="none" fo:border-bottom="none"/>
    </style:style>
    <style:style style:name="Tableau7.A3" style:family="table-cell">
      <style:table-cell-properties fo:padding="0.097cm" fo:border-left="0.5pt solid #000000" fo:border-right="none" fo:border-top="none" fo:border-bottom="0.5pt solid #000000"/>
    </style:style>
    <style:style style:name="Tableau7.B3" style:family="table-cell">
      <style:table-cell-properties fo:background-color="#002b36" fo:padding="0.097cm" fo:border-left="none" fo:border-right="0.5pt solid #000000" fo:border-top="none" fo:border-bottom="0.5pt solid #000000"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>
        <style:background-image/>
      </style:table-cell-properties>
    </style:style>
    <style:style style:name="Tableau9" style:family="table">
      <style:table-properties style:width="17cm" table:align="margins" style:writing-mode="lr-tb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5pt solid #000000"/>
    </style:style>
    <style:style style:name="Tableau9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10" style:family="table">
      <style:table-properties style:width="17cm" table:align="margins" style:writing-mode="lr-tb"/>
    </style:style>
    <style:style style:name="Tableau10.A" style:family="table-column">
      <style:table-column-properties style:column-width="3.593cm" style:rel-column-width="13850*"/>
    </style:style>
    <style:style style:name="Tableau10.B" style:family="table-column">
      <style:table-column-properties style:column-width="13.407cm" style:rel-column-width="51685*"/>
    </style:style>
    <style:style style:name="Tableau10.A1" style:family="table-cell">
      <style:table-cell-properties fo:padding="0.097cm" fo:border-left="0.5pt solid #000000" fo:border-right="none" fo:border-top="0.5pt solid #000000" fo:border-bottom="none"/>
    </style:style>
    <style:style style:name="Tableau10.B1" style:family="table-cell">
      <style:table-cell-properties fo:padding="0.097cm" fo:border-left="none" fo:border-right="0.5pt solid #000000" fo:border-top="0.5pt solid #000000" fo:border-bottom="none"/>
    </style:style>
    <style:style style:name="Tableau10.A2" style:family="table-cell">
      <style:table-cell-properties fo:padding="0.097cm" fo:border-left="0.5pt solid #000000" fo:border-right="none" fo:border-top="none" fo:border-bottom="none"/>
    </style:style>
    <style:style style:name="Tableau10.B2" style:family="table-cell">
      <style:table-cell-properties fo:padding="0.097cm" fo:border-left="none" fo:border-right="0.5pt solid #000000" fo:border-top="none" fo:border-bottom="none"/>
    </style:style>
    <style:style style:name="Tableau10.A3" style:family="table-cell">
      <style:table-cell-properties fo:padding="0.097cm" fo:border-left="0.5pt solid #000000" fo:border-right="none" fo:border-top="none" fo:border-bottom="0.5pt solid #000000"/>
    </style:style>
    <style:style style:name="Tableau10.B3" style:family="table-cell">
      <style:table-cell-properties fo:padding="0.097cm" fo:border-left="none" fo:border-right="0.5pt solid #000000" fo:border-top="none" fo:border-bottom="0.5pt solid #000000"/>
    </style:style>
    <style:style style:name="Tableau11" style:family="table">
      <style:table-properties style:width="17cm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5pt solid #000000"/>
    </style:style>
    <style:style style:name="Tableau11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12" style:family="table">
      <style:table-properties style:width="17cm" table:align="margins" style:writing-mode="lr-tb"/>
    </style:style>
    <style:style style:name="Tableau12.A" style:family="table-column">
      <style:table-column-properties style:column-width="3.593cm" style:rel-column-width="13850*"/>
    </style:style>
    <style:style style:name="Tableau12.B" style:family="table-column">
      <style:table-column-properties style:column-width="13.407cm" style:rel-column-width="51685*"/>
    </style:style>
    <style:style style:name="Tableau12.A1" style:family="table-cell">
      <style:table-cell-properties fo:padding="0.097cm" fo:border-left="0.5pt solid #000000" fo:border-right="none" fo:border-top="0.5pt solid #000000" fo:border-bottom="none"/>
    </style:style>
    <style:style style:name="Tableau12.B1" style:family="table-cell">
      <style:table-cell-properties fo:padding="0.097cm" fo:border-left="none" fo:border-right="0.5pt solid #000000" fo:border-top="0.5pt solid #000000" fo:border-bottom="none"/>
    </style:style>
    <style:style style:name="Tableau12.A2" style:family="table-cell">
      <style:table-cell-properties fo:padding="0.097cm" fo:border-left="0.5pt solid #000000" fo:border-right="none" fo:border-top="none" fo:border-bottom="none"/>
    </style:style>
    <style:style style:name="Tableau12.B2" style:family="table-cell">
      <style:table-cell-properties fo:padding="0.097cm" fo:border-left="none" fo:border-right="0.5pt solid #000000" fo:border-top="none" fo:border-bottom="none"/>
    </style:style>
    <style:style style:name="Tableau12.3" style:family="table-row">
      <style:table-row-properties style:min-row-height="2.219cm"/>
    </style:style>
    <style:style style:name="Tableau12.A3" style:family="table-cell">
      <style:table-cell-properties fo:padding="0.097cm" fo:border-left="0.5pt solid #000000" fo:border-right="none" fo:border-top="none" fo:border-bottom="0.5pt solid #000000"/>
    </style:style>
    <style:style style:name="Tableau12.B3" style:family="table-cell">
      <style:table-cell-properties fo:padding="0.097cm" fo:border-left="none" fo:border-right="0.5pt solid #000000" fo:border-top="none" fo:border-bottom="0.5pt solid #000000"/>
    </style:style>
    <style:style style:name="Tableau13" style:family="table">
      <style:table-properties style:width="17cm" table:align="margins" style:writing-mode="lr-tb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5pt solid #000000"/>
    </style:style>
    <style:style style:name="Tableau13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14" style:family="table">
      <style:table-properties style:width="17cm" table:align="margins" style:writing-mode="lr-tb"/>
    </style:style>
    <style:style style:name="Tableau14.A" style:family="table-column">
      <style:table-column-properties style:column-width="3.593cm" style:rel-column-width="13850*"/>
    </style:style>
    <style:style style:name="Tableau14.B" style:family="table-column">
      <style:table-column-properties style:column-width="13.407cm" style:rel-column-width="51685*"/>
    </style:style>
    <style:style style:name="Tableau14.A1" style:family="table-cell">
      <style:table-cell-properties fo:padding="0.097cm" fo:border-left="0.5pt solid #000000" fo:border-right="none" fo:border-top="0.5pt solid #000000" fo:border-bottom="none"/>
    </style:style>
    <style:style style:name="Tableau14.B1" style:family="table-cell">
      <style:table-cell-properties fo:padding="0.097cm" fo:border-left="none" fo:border-right="0.5pt solid #000000" fo:border-top="0.5pt solid #000000" fo:border-bottom="none"/>
    </style:style>
    <style:style style:name="Tableau14.A2" style:family="table-cell">
      <style:table-cell-properties fo:padding="0.097cm" fo:border-left="0.5pt solid #000000" fo:border-right="none" fo:border-top="none" fo:border-bottom="none"/>
    </style:style>
    <style:style style:name="Tableau14.B2" style:family="table-cell">
      <style:table-cell-properties fo:padding="0.097cm" fo:border-left="none" fo:border-right="0.5pt solid #000000" fo:border-top="none" fo:border-bottom="none"/>
    </style:style>
    <style:style style:name="Tableau14.3" style:family="table-row">
      <style:table-row-properties style:min-row-height="2.219cm"/>
    </style:style>
    <style:style style:name="Tableau14.A3" style:family="table-cell">
      <style:table-cell-properties fo:padding="0.097cm" fo:border-left="0.5pt solid #000000" fo:border-right="none" fo:border-top="none" fo:border-bottom="0.5pt solid #000000"/>
    </style:style>
    <style:style style:name="Tableau14.B3" style:family="table-cell">
      <style:table-cell-properties fo:padding="0.097cm" fo:border-left="none" fo:border-right="0.5pt solid #000000" fo:border-top="none" fo:border-bottom="0.5pt solid #000000"/>
    </style:style>
    <style:style style:name="Tableau15" style:family="table">
      <style:table-properties style:width="17cm" table:align="margins" style:writing-mode="lr-tb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padding="0.097cm" fo:border="0.5pt solid #000000"/>
    </style:style>
    <style:style style:name="Tableau15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16" style:family="table">
      <style:table-properties style:width="17cm" table:align="margins" style:writing-mode="lr-tb"/>
    </style:style>
    <style:style style:name="Tableau16.A" style:family="table-column">
      <style:table-column-properties style:column-width="3.593cm" style:rel-column-width="13850*"/>
    </style:style>
    <style:style style:name="Tableau16.B" style:family="table-column">
      <style:table-column-properties style:column-width="13.407cm" style:rel-column-width="51685*"/>
    </style:style>
    <style:style style:name="Tableau16.A1" style:family="table-cell">
      <style:table-cell-properties fo:padding="0.097cm" fo:border-left="0.5pt solid #000000" fo:border-right="none" fo:border-top="0.5pt solid #000000" fo:border-bottom="none"/>
    </style:style>
    <style:style style:name="Tableau16.B1" style:family="table-cell">
      <style:table-cell-properties fo:padding="0.097cm" fo:border-left="none" fo:border-right="0.5pt solid #000000" fo:border-top="0.5pt solid #000000" fo:border-bottom="none"/>
    </style:style>
    <style:style style:name="Tableau16.A2" style:family="table-cell">
      <style:table-cell-properties fo:padding="0.097cm" fo:border-left="0.5pt solid #000000" fo:border-right="none" fo:border-top="none" fo:border-bottom="none"/>
    </style:style>
    <style:style style:name="Tableau16.B2" style:family="table-cell">
      <style:table-cell-properties fo:padding="0.097cm" fo:border-left="none" fo:border-right="0.5pt solid #000000" fo:border-top="none" fo:border-bottom="none"/>
    </style:style>
    <style:style style:name="Tableau16.3" style:family="table-row">
      <style:table-row-properties style:min-row-height="2.219cm"/>
    </style:style>
    <style:style style:name="Tableau16.A3" style:family="table-cell">
      <style:table-cell-properties fo:padding="0.097cm" fo:border-left="0.5pt solid #000000" fo:border-right="none" fo:border-top="none" fo:border-bottom="0.5pt solid #000000"/>
    </style:style>
    <style:style style:name="Tableau16.B3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Standard" style:list-style-name="L1">
      <style:text-properties officeooo:rsid="001a81f9" officeooo:paragraph-rsid="0018cec3"/>
    </style:style>
    <style:style style:name="P5" style:family="paragraph" style:parent-style-name="Standard" style:list-style-name="L1">
      <style:text-properties officeooo:rsid="0018cec3" officeooo:paragraph-rsid="0018cec3"/>
    </style:style>
    <style:style style:name="P6" style:family="paragraph" style:parent-style-name="Standard" style:list-style-name="L1">
      <style:text-properties officeooo:rsid="0018cec3" officeooo:paragraph-rsid="001f5ca1"/>
    </style:style>
    <style:style style:name="P7" style:family="paragraph" style:parent-style-name="Standard" style:list-style-name="L1">
      <style:text-properties officeooo:rsid="00205042" officeooo:paragraph-rsid="00205042"/>
    </style:style>
    <style:style style:name="P8" style:family="paragraph" style:parent-style-name="Standard" style:list-style-name="L1">
      <style:text-properties officeooo:rsid="001c4a18" officeooo:paragraph-rsid="001f5ca1"/>
    </style:style>
    <style:style style:name="P9" style:family="paragraph" style:parent-style-name="Standard" style:list-style-name="L1">
      <style:text-properties officeooo:rsid="00205042" officeooo:paragraph-rsid="0027c77b"/>
    </style:style>
    <style:style style:name="P10" style:family="paragraph" style:parent-style-name="Standard" style:list-style-name="L1">
      <style:text-properties officeooo:rsid="0027c77b" officeooo:paragraph-rsid="00280817"/>
    </style:style>
    <style:style style:name="P11" style:family="paragraph" style:parent-style-name="Standard" style:list-style-name="L1">
      <style:text-properties officeooo:rsid="00205042" officeooo:paragraph-rsid="00280817"/>
    </style:style>
    <style:style style:name="P12" style:family="paragraph" style:parent-style-name="Text_20_body" style:list-style-name="L2">
      <style:text-properties officeooo:rsid="0023ff74" officeooo:paragraph-rsid="0023ff74"/>
    </style:style>
    <style:style style:name="P13" style:family="paragraph" style:parent-style-name="Text_20_body" style:list-style-name="L2">
      <style:text-properties fo:color="#ffbf00" loext:opacity="100%" officeooo:rsid="0023ff74" officeooo:paragraph-rsid="0023ff74"/>
    </style:style>
    <style:style style:name="P14" style:family="paragraph" style:parent-style-name="Text_20_body" style:list-style-name="L2">
      <style:text-properties fo:color="#000000" loext:opacity="100%" officeooo:rsid="0023ff74" officeooo:paragraph-rsid="0023ff74"/>
    </style:style>
    <style:style style:name="P15" style:family="paragraph" style:parent-style-name="Text_20_body" style:list-style-name="L2">
      <style:text-properties fo:color="#000000" loext:opacity="100%" officeooo:rsid="0025cc54" officeooo:paragraph-rsid="0025cc54"/>
    </style:style>
    <style:style style:name="P16" style:family="paragraph" style:parent-style-name="Text_20_body">
      <style:text-properties fo:color="#000000" loext:opacity="100%" officeooo:rsid="0025cc54" officeooo:paragraph-rsid="0025cc54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ext_20_body">
      <style:text-properties officeooo:rsid="002ab7f4" officeooo:paragraph-rsid="002b18e9"/>
    </style:style>
    <style:style style:name="P19" style:family="paragraph" style:parent-style-name="Text_20_body">
      <style:text-properties officeooo:rsid="002c2d5f" officeooo:paragraph-rsid="002c2d5f"/>
    </style:style>
    <style:style style:name="P20" style:family="paragraph" style:parent-style-name="Text_20_body">
      <style:text-properties officeooo:rsid="002b18e9" officeooo:paragraph-rsid="002b18e9"/>
    </style:style>
    <style:style style:name="P21" style:family="paragraph" style:parent-style-name="Text_20_body" style:list-style-name="L3">
      <style:text-properties officeooo:rsid="0032469b" officeooo:paragraph-rsid="002b18e9"/>
    </style:style>
    <style:style style:name="P22" style:family="paragraph" style:parent-style-name="Text_20_body" style:list-style-name="L3">
      <style:text-properties officeooo:rsid="0032469b" officeooo:paragraph-rsid="0032469b"/>
    </style:style>
    <style:style style:name="P23" style:family="paragraph" style:parent-style-name="Text_20_body">
      <style:text-properties officeooo:rsid="0032469b" officeooo:paragraph-rsid="0032469b"/>
    </style:style>
    <style:style style:name="P24" style:family="paragraph" style:parent-style-name="Text_20_body">
      <style:text-properties officeooo:rsid="003576a9" officeooo:paragraph-rsid="003576a9"/>
    </style:style>
    <style:style style:name="P25" style:family="paragraph" style:parent-style-name="Text_20_body">
      <style:text-properties officeooo:rsid="0036d809" officeooo:paragraph-rsid="0036d809"/>
    </style:style>
    <style:style style:name="P26" style:family="paragraph" style:parent-style-name="Text_20_body">
      <style:text-properties fo:font-weight="bold" officeooo:rsid="003ca902" officeooo:paragraph-rsid="003ca902" style:font-weight-asian="bold" style:font-weight-complex="bold"/>
    </style:style>
    <style:style style:name="P27" style:family="paragraph" style:parent-style-name="Heading_20_1">
      <style:paragraph-properties fo:break-before="page"/>
      <style:text-properties officeooo:rsid="003ca902" officeooo:paragraph-rsid="003ca902"/>
    </style:style>
    <style:style style:name="P28" style:family="paragraph" style:parent-style-name="Table">
      <style:paragraph-properties fo:keep-with-next="always"/>
      <style:text-properties officeooo:paragraph-rsid="0055c44d"/>
    </style:style>
    <style:style style:name="P29" style:family="paragraph" style:parent-style-name="Table_20_Contents">
      <style:text-properties fo:font-size="12pt" officeooo:rsid="0057920c" officeooo:paragraph-rsid="0057920c" style:font-size-asian="12pt" style:font-name-complex="FreeSans" style:font-size-complex="12pt"/>
    </style:style>
    <style:style style:name="P30" style:family="paragraph" style:parent-style-name="Table_20_Contents">
      <style:text-properties fo:font-size="12pt" fo:font-style="italic" officeooo:rsid="00583fd0" officeooo:paragraph-rsid="00583fd0" style:font-size-asian="12pt" style:font-style-asian="italic" style:font-name-complex="FreeSans" style:font-size-complex="12pt" style:font-style-complex="italic"/>
    </style:style>
    <style:style style:name="P31" style:family="paragraph" style:parent-style-name="Table_20_Contents">
      <style:text-properties fo:font-size="12pt" style:font-size-asian="12pt" style:font-name-complex="FreeSans" style:font-size-complex="12pt"/>
    </style:style>
    <style:style style:name="P32" style:family="paragraph" style:parent-style-name="Table_20_Contents">
      <style:text-properties fo:font-size="12pt" fo:font-style="italic" officeooo:rsid="0057920c" officeooo:paragraph-rsid="00583fd0" style:font-size-asian="12pt" style:font-style-asian="italic" style:font-name-complex="FreeSans" style:font-size-complex="12pt" style:font-style-complex="italic"/>
    </style:style>
    <style:style style:name="P33" style:family="paragraph" style:parent-style-name="Table">
      <style:text-properties officeooo:rsid="0057920c" officeooo:paragraph-rsid="0057920c"/>
    </style:style>
    <style:style style:name="P3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officeooo:rsid="0041a19e" officeooo:paragraph-rsid="0041a1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officeooo:rsid="003e7a3d" officeooo:paragraph-rsid="003e7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officeooo:rsid="00416abc" officeooo:paragraph-rsid="00416ab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1a19e" officeooo:paragraph-rsid="0041a1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011c8" officeooo:paragraph-rsid="00401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e7a3d" officeooo:paragraph-rsid="003e7a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2f4aa" officeooo:paragraph-rsid="0042f4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320ee" officeooo:paragraph-rsid="004320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e7a3d" officeooo:paragraph-rsid="003e7a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ab079" officeooo:paragraph-rsid="005ab0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320ee" officeooo:paragraph-rsid="004320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49c9c" officeooo:paragraph-rsid="00449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f988" officeooo:paragraph-rsid="0045f9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89d90" officeooo:paragraph-rsid="00489d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f988" officeooo:paragraph-rsid="0045f9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92828" officeooo:paragraph-rsid="0049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9e835" officeooo:paragraph-rsid="0049e8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af24b" officeooo:paragraph-rsid="004af2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96aa" officeooo:paragraph-rsid="004af2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92828" officeooo:paragraph-rsid="004af2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9e835" officeooo:paragraph-rsid="004af2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af24b" officeooo:paragraph-rsid="004af2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be44" officeooo:paragraph-rsid="004bf4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bf4e9" officeooo:paragraph-rsid="004bf4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bf4e9" officeooo:paragraph-rsid="004bf4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af24b" officeooo:paragraph-rsid="004af2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be44" officeooo:paragraph-rsid="004c30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bf4e9" officeooo:paragraph-rsid="004dbe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dbee3" officeooo:paragraph-rsid="004dbe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e7bcc" officeooo:paragraph-rsid="004e7b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e7bcc" officeooo:paragraph-rsid="004e7b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96aa" officeooo:paragraph-rsid="004e7b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eede3" officeooo:paragraph-rsid="004eed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eede3" officeooo:paragraph-rsid="004eed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c1f0" officeooo:paragraph-rsid="004eed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 style:list-style-name="L4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c1f0" officeooo:paragraph-rsid="004eed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9d7c0" officeooo:paragraph-rsid="0059d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0817" officeooo:paragraph-rsid="0059d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9d7c0" officeooo:paragraph-rsid="0059d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4c509" officeooo:paragraph-rsid="0054c5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4c509" officeooo:paragraph-rsid="0054c5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53cee" officeooo:paragraph-rsid="00553c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ext_20_body">
      <style:text-properties officeooo:rsid="00318232" officeooo:paragraph-rsid="00318232"/>
    </style:style>
    <style:style style:name="P80" style:family="paragraph" style:parent-style-name="Text_20_body">
      <style:text-properties officeooo:rsid="00e58c0b" officeooo:paragraph-rsid="00e58c0b"/>
    </style:style>
    <style:style style:name="P81" style:family="paragraph" style:parent-style-name="Heading_20_1">
      <style:paragraph-properties fo:break-before="page" style:writing-mode="lr-tb" style:writing-mode-automatic="false"/>
      <style:text-properties officeooo:rsid="006092b8" officeooo:paragraph-rsid="006092b8"/>
    </style:style>
    <style:style style:name="P82" style:family="paragraph" style:parent-style-name="Text_20_body">
      <style:paragraph-properties style:writing-mode="lr-tb" style:writing-mode-automatic="false"/>
      <style:text-properties officeooo:rsid="00ca9c54" officeooo:paragraph-rsid="00ca9c54"/>
    </style:style>
    <style:style style:name="P83" style:family="paragraph" style:parent-style-name="Heading_20_2">
      <style:text-properties officeooo:rsid="00bc0c8c" officeooo:paragraph-rsid="00bc0c8c"/>
    </style:style>
    <style:style style:name="P84" style:family="paragraph" style:parent-style-name="Heading_20_3">
      <style:text-properties officeooo:rsid="00c69f47" officeooo:paragraph-rsid="00ca9c54"/>
    </style:style>
    <style:style style:name="P85" style:family="paragraph" style:parent-style-name="Text_20_body">
      <style:text-properties officeooo:rsid="00cac213" officeooo:paragraph-rsid="00cac213"/>
    </style:style>
    <style:style style:name="P86" style:family="paragraph" style:parent-style-name="Text_20_body">
      <style:text-properties officeooo:rsid="00cbc44a" officeooo:paragraph-rsid="00cbc44a"/>
    </style:style>
    <style:style style:name="P87" style:family="paragraph" style:parent-style-name="Text_20_body">
      <style:paragraph-properties style:writing-mode="lr-tb" style:writing-mode-automatic="false"/>
      <style:text-properties officeooo:rsid="00cd1681" officeooo:paragraph-rsid="00cd1681"/>
    </style:style>
    <style:style style:name="P88" style:family="paragraph" style:parent-style-name="Heading_20_2" style:list-style-name="">
      <style:text-properties officeooo:rsid="00bc0c8c" officeooo:paragraph-rsid="00c69f47"/>
    </style:style>
    <style:style style:name="P89" style:family="paragraph" style:parent-style-name="Heading_20_2">
      <style:paragraph-properties fo:break-before="page"/>
      <style:text-properties officeooo:rsid="00bc0c8c" officeooo:paragraph-rsid="00c69f47"/>
    </style:style>
    <style:style style:name="P90" style:family="paragraph" style:parent-style-name="Heading_20_3">
      <style:text-properties officeooo:rsid="00c69f47" officeooo:paragraph-rsid="00c69f47"/>
    </style:style>
    <style:style style:name="P91" style:family="paragraph" style:parent-style-name="Text_20_body">
      <style:text-properties officeooo:rsid="00c85313" officeooo:paragraph-rsid="00c85313"/>
    </style:style>
    <style:style style:name="P92" style:family="paragraph" style:parent-style-name="Heading_20_3">
      <style:text-properties officeooo:paragraph-rsid="00c69f47"/>
    </style:style>
    <style:style style:name="P93" style:family="paragraph" style:parent-style-name="Heading_20_2" style:list-style-name=""/>
    <style:style style:name="P94" style:family="paragraph" style:parent-style-name="Heading_20_2">
      <style:paragraph-properties fo:break-before="page"/>
    </style:style>
    <style:style style:name="P95" style:family="paragraph" style:parent-style-name="Heading_20_3">
      <style:text-properties officeooo:paragraph-rsid="00c4bebf"/>
    </style:style>
    <style:style style:name="P96" style:family="paragraph" style:parent-style-name="Text_20_body">
      <style:text-properties officeooo:rsid="00c65f21" officeooo:paragraph-rsid="00c65f21"/>
    </style:style>
    <style:style style:name="P97" style:family="paragraph" style:parent-style-name="Text_20_body">
      <style:text-properties fo:color="#2a6099" loext:opacity="100%" officeooo:rsid="00c2b7fd" officeooo:paragraph-rsid="00c4bebf"/>
    </style:style>
    <style:style style:name="P98" style:family="paragraph" style:parent-style-name="Heading_20_3">
      <style:text-properties officeooo:paragraph-rsid="00bc0c8c"/>
    </style:style>
    <style:style style:name="P99" style:family="paragraph" style:parent-style-name="Heading_20_2">
      <style:paragraph-properties fo:break-before="page"/>
      <style:text-properties officeooo:paragraph-rsid="00c0af64"/>
    </style:style>
    <style:style style:name="P100" style:family="paragraph" style:parent-style-name="Text_20_body">
      <style:text-properties officeooo:rsid="00c2b7fd" officeooo:paragraph-rsid="00c2b7fd"/>
    </style:style>
    <style:style style:name="P101" style:family="paragraph" style:parent-style-name="Text_20_body">
      <style:text-properties fo:color="#2a6099" loext:opacity="100%" officeooo:rsid="00c2b7fd" officeooo:paragraph-rsid="00c2b7fd"/>
    </style:style>
    <style:style style:name="P102" style:family="paragraph" style:parent-style-name="Heading_20_1">
      <style:paragraph-properties fo:break-before="page" style:writing-mode="lr-tb" style:writing-mode-automatic="false"/>
      <style:text-properties officeooo:rsid="006092b8" officeooo:paragraph-rsid="006112c0"/>
    </style:style>
    <style:style style:name="P103" style:family="paragraph" style:parent-style-name="Text_20_body">
      <style:text-properties officeooo:rsid="006664ab" officeooo:paragraph-rsid="006664ab"/>
    </style:style>
    <style:style style:name="P104" style:family="paragraph" style:parent-style-name="Text_20_body">
      <style:text-properties officeooo:rsid="0067463e" officeooo:paragraph-rsid="0067463e"/>
    </style:style>
    <style:style style:name="P105" style:family="paragraph" style:parent-style-name="Text_20_body" style:list-style-name="L5">
      <style:text-properties officeooo:rsid="0067e1b7" officeooo:paragraph-rsid="0067e1b7"/>
    </style:style>
    <style:style style:name="P106" style:family="paragraph" style:parent-style-name="Text_20_body">
      <style:text-properties officeooo:rsid="0067e1b7" officeooo:paragraph-rsid="0067e1b7"/>
    </style:style>
    <style:style style:name="P107" style:family="paragraph" style:parent-style-name="Text_20_body" style:list-style-name="L6">
      <style:text-properties officeooo:rsid="0067e1b7" officeooo:paragraph-rsid="0067e1b7"/>
    </style:style>
    <style:style style:name="P108" style:family="paragraph" style:parent-style-name="Text_20_body" style:list-style-name="L6">
      <style:text-properties officeooo:rsid="00691afd" officeooo:paragraph-rsid="00691afd"/>
    </style:style>
    <style:style style:name="P109" style:family="paragraph" style:parent-style-name="Text_20_body">
      <style:text-properties style:text-underline-style="solid" style:text-underline-type="double" style:text-underline-width="auto" style:text-underline-color="font-color" officeooo:rsid="00691afd" officeooo:paragraph-rsid="00691afd"/>
    </style:style>
    <style:style style:name="P110" style:family="paragraph" style:parent-style-name="Text_20_body">
      <style:text-properties officeooo:rsid="006fb5b2" officeooo:paragraph-rsid="006fb5b2"/>
    </style:style>
    <style:style style:name="P111" style:family="paragraph" style:parent-style-name="Text_20_body">
      <style:text-properties officeooo:rsid="006fb5b2" officeooo:paragraph-rsid="00878256"/>
    </style:style>
    <style:style style:name="P112" style:family="paragraph" style:parent-style-name="Text_20_body">
      <style:paragraph-properties style:writing-mode="lr-tb" style:writing-mode-automatic="false"/>
      <style:text-properties officeooo:rsid="00717755" officeooo:paragraph-rsid="00717755"/>
    </style:style>
    <style:style style:name="P113" style:family="paragraph" style:parent-style-name="Text_20_body">
      <style:text-properties officeooo:rsid="00717755" officeooo:paragraph-rsid="00878256"/>
    </style:style>
    <style:style style:name="P114" style:family="paragraph" style:parent-style-name="Text_20_body">
      <style:paragraph-properties style:writing-mode="lr-tb" style:writing-mode-automatic="false"/>
      <style:text-properties officeooo:rsid="0082b35f" officeooo:paragraph-rsid="0082b35f"/>
    </style:style>
    <style:style style:name="P115" style:family="paragraph" style:parent-style-name="Table_20_Contents">
      <style:paragraph-properties fo:text-align="center" style:justify-single-word="false"/>
      <style:text-properties officeooo:rsid="00881d2c" officeooo:paragraph-rsid="00881d2c"/>
    </style:style>
    <style:style style:name="P116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fo:color="#839496" loext:opacity="100%" fo:language="zxx" fo:country="none" fo:font-style="normal" style:text-underline-style="none" fo:font-weight="normal" officeooo:rsid="007e4837" officeooo:paragraph-rsid="00881d2c" fo:background-color="transparent"/>
    </style:style>
    <style:style style:name="P117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style:use-window-font-color="true" loext:opacity="0%" fo:language="zxx" fo:country="none" fo:font-style="normal" style:text-underline-style="none" fo:font-weight="normal" officeooo:rsid="007e4837" officeooo:paragraph-rsid="00881d2c" fo:background-color="transparent"/>
    </style:style>
    <style:style style:name="P118" style:family="paragraph" style:parent-style-name="Table_20_Contents">
      <style:text-properties officeooo:rsid="007cfc64" officeooo:paragraph-rsid="007cfc64"/>
    </style:style>
    <style:style style:name="P119" style:family="paragraph" style:parent-style-name="Table_20_Contents">
      <style:text-properties officeooo:rsid="007d4b99" officeooo:paragraph-rsid="007d4b99"/>
    </style:style>
    <style:style style:name="P120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fo:color="#839496" loext:opacity="100%" fo:language="zxx" fo:country="none" fo:font-style="normal" style:text-underline-style="none" fo:font-weight="normal" officeooo:rsid="007e4837" officeooo:paragraph-rsid="0080fb45" fo:background-color="transparent"/>
    </style:style>
    <style:style style:name="P121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style:use-window-font-color="true" loext:opacity="0%" fo:language="zxx" fo:country="none" fo:font-style="normal" style:text-underline-style="none" fo:font-weight="normal" officeooo:rsid="007e4837" officeooo:paragraph-rsid="0080fb45" fo:background-color="transparent"/>
    </style:style>
    <style:style style:name="P122" style:family="paragraph" style:parent-style-name="Table_20_Contents">
      <style:text-properties officeooo:rsid="0080fb45" officeooo:paragraph-rsid="0080fb45"/>
    </style:style>
    <style:style style:name="P123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fo:color="#839496" loext:opacity="100%" fo:language="zxx" fo:country="none" fo:font-style="normal" style:text-underline-style="none" fo:font-weight="normal" officeooo:rsid="007e4837" officeooo:paragraph-rsid="00812a66" fo:background-color="transparent"/>
    </style:style>
    <style:style style:name="P124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style:use-window-font-color="true" loext:opacity="0%" fo:language="zxx" fo:country="none" fo:font-style="normal" style:text-underline-style="none" fo:font-weight="normal" officeooo:rsid="007e4837" officeooo:paragraph-rsid="00812a66" fo:background-color="transparent"/>
    </style:style>
    <style:style style:name="P125" style:family="paragraph" style:parent-style-name="Heading_20_3" style:list-style-name="">
      <style:text-properties officeooo:paragraph-rsid="00898a6e"/>
    </style:style>
    <style:style style:name="P126" style:family="paragraph" style:parent-style-name="Heading_20_3">
      <style:paragraph-properties fo:break-before="page"/>
      <style:text-properties officeooo:paragraph-rsid="00898a6e"/>
    </style:style>
    <style:style style:name="P127" style:family="paragraph" style:parent-style-name="Text_20_body">
      <style:text-properties officeooo:paragraph-rsid="00898a6e"/>
    </style:style>
    <style:style style:name="P128" style:family="paragraph" style:parent-style-name="Text_20_body">
      <style:text-properties officeooo:rsid="006fb5b2" officeooo:paragraph-rsid="00898a6e"/>
    </style:style>
    <style:style style:name="P129" style:family="paragraph" style:parent-style-name="Text_20_body">
      <style:paragraph-properties style:writing-mode="lr-tb" style:writing-mode-automatic="false"/>
      <style:text-properties officeooo:rsid="00717755" officeooo:paragraph-rsid="00898a6e"/>
    </style:style>
    <style:style style:name="P130" style:family="paragraph" style:parent-style-name="Text_20_body">
      <style:paragraph-properties style:writing-mode="lr-tb" style:writing-mode-automatic="false"/>
      <style:text-properties officeooo:rsid="0082b35f" officeooo:paragraph-rsid="00898a6e"/>
    </style:style>
    <style:style style:name="P131" style:family="paragraph" style:parent-style-name="Table_20_Contents">
      <style:paragraph-properties fo:text-align="center" style:justify-single-word="false"/>
      <style:text-properties officeooo:rsid="00881d2c" officeooo:paragraph-rsid="00898a6e"/>
    </style:style>
    <style:style style:name="P132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fo:color="#839496" loext:opacity="100%" fo:language="zxx" fo:country="none" fo:font-style="normal" style:text-underline-style="none" fo:font-weight="normal" officeooo:rsid="007e4837" officeooo:paragraph-rsid="00898a6e" fo:background-color="transparent"/>
    </style:style>
    <style:style style:name="P133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style:use-window-font-color="true" loext:opacity="0%" fo:language="zxx" fo:country="none" fo:font-style="normal" style:text-underline-style="none" fo:font-weight="normal" officeooo:rsid="007e4837" officeooo:paragraph-rsid="00898a6e" fo:background-color="transparent"/>
    </style:style>
    <style:style style:name="P134" style:family="paragraph" style:parent-style-name="Table_20_Contents">
      <style:text-properties officeooo:rsid="007cfc64" officeooo:paragraph-rsid="00898a6e"/>
    </style:style>
    <style:style style:name="P135" style:family="paragraph" style:parent-style-name="Table_20_Contents">
      <style:text-properties officeooo:rsid="007d4b99" officeooo:paragraph-rsid="00898a6e"/>
    </style:style>
    <style:style style:name="P136" style:family="paragraph" style:parent-style-name="Table_20_Contents">
      <style:text-properties officeooo:rsid="0080fb45" officeooo:paragraph-rsid="00898a6e"/>
    </style:style>
    <style:style style:name="P137" style:family="paragraph" style:parent-style-name="Heading_20_3" style:list-style-name="">
      <style:text-properties officeooo:paragraph-rsid="008d0c76"/>
    </style:style>
    <style:style style:name="P138" style:family="paragraph" style:parent-style-name="Heading_20_3">
      <style:paragraph-properties fo:break-before="page"/>
      <style:text-properties officeooo:paragraph-rsid="008d0c76"/>
    </style:style>
    <style:style style:name="P139" style:family="paragraph" style:parent-style-name="Text_20_body">
      <style:text-properties officeooo:paragraph-rsid="008d0c76"/>
    </style:style>
    <style:style style:name="P140" style:family="paragraph" style:parent-style-name="Text_20_body">
      <style:text-properties officeooo:rsid="006fb5b2" officeooo:paragraph-rsid="008d0c76"/>
    </style:style>
    <style:style style:name="P141" style:family="paragraph" style:parent-style-name="Text_20_body">
      <style:paragraph-properties style:writing-mode="lr-tb" style:writing-mode-automatic="false"/>
      <style:text-properties officeooo:rsid="00717755" officeooo:paragraph-rsid="008d0c76"/>
    </style:style>
    <style:style style:name="P142" style:family="paragraph" style:parent-style-name="Text_20_body">
      <style:paragraph-properties style:writing-mode="lr-tb" style:writing-mode-automatic="false"/>
      <style:text-properties officeooo:rsid="0082b35f" officeooo:paragraph-rsid="008d0c76"/>
    </style:style>
    <style:style style:name="P143" style:family="paragraph" style:parent-style-name="Table_20_Contents">
      <style:text-properties officeooo:rsid="007cfc64" officeooo:paragraph-rsid="008d0c76"/>
    </style:style>
    <style:style style:name="P144" style:family="paragraph" style:parent-style-name="Table_20_Contents">
      <style:text-properties fo:color="#ff0000" loext:opacity="100%" officeooo:rsid="007d4b99" officeooo:paragraph-rsid="008d0c76"/>
    </style:style>
    <style:style style:name="P145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fo:color="#839496" loext:opacity="100%" fo:language="zxx" fo:country="none" fo:font-style="normal" style:text-underline-style="none" fo:font-weight="normal" officeooo:rsid="007e4837" officeooo:paragraph-rsid="008d0c76" fo:background-color="transparent"/>
    </style:style>
    <style:style style:name="P146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style:use-window-font-color="true" loext:opacity="0%" fo:language="zxx" fo:country="none" fo:font-style="normal" style:text-underline-style="none" fo:font-weight="normal" officeooo:rsid="007e4837" officeooo:paragraph-rsid="008d0c76" fo:background-color="transparent"/>
    </style:style>
    <style:style style:name="P147" style:family="paragraph" style:parent-style-name="Table_20_Contents">
      <style:text-properties fo:color="#ff0000" loext:opacity="100%" officeooo:rsid="0080fb45" officeooo:paragraph-rsid="008d0c76"/>
    </style:style>
    <style:style style:name="P148" style:family="paragraph" style:parent-style-name="Heading_20_3">
      <style:text-properties officeooo:paragraph-rsid="0094213b"/>
    </style:style>
    <style:style style:name="P149" style:family="paragraph" style:parent-style-name="Text_20_body">
      <style:text-properties officeooo:paragraph-rsid="0094213b"/>
    </style:style>
    <style:style style:name="P150" style:family="paragraph" style:parent-style-name="Text_20_body">
      <style:text-properties officeooo:rsid="006fb5b2" officeooo:paragraph-rsid="0094213b"/>
    </style:style>
    <style:style style:name="P151" style:family="paragraph" style:parent-style-name="Text_20_body">
      <style:paragraph-properties style:writing-mode="lr-tb" style:writing-mode-automatic="false"/>
      <style:text-properties officeooo:rsid="00717755" officeooo:paragraph-rsid="0094213b"/>
    </style:style>
    <style:style style:name="P152" style:family="paragraph" style:parent-style-name="Text_20_body">
      <style:paragraph-properties style:writing-mode="lr-tb" style:writing-mode-automatic="false"/>
      <style:text-properties officeooo:rsid="0082b35f" officeooo:paragraph-rsid="0094213b"/>
    </style:style>
    <style:style style:name="P153" style:family="paragraph" style:parent-style-name="Table_20_Contents">
      <style:text-properties officeooo:rsid="007cfc64" officeooo:paragraph-rsid="0094213b"/>
    </style:style>
    <style:style style:name="P154" style:family="paragraph" style:parent-style-name="Table_20_Contents">
      <style:text-properties fo:color="#ff0000" loext:opacity="100%" officeooo:rsid="007d4b99" officeooo:paragraph-rsid="0094213b"/>
    </style:style>
    <style:style style:name="P155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fo:color="#839496" loext:opacity="100%" fo:language="zxx" fo:country="none" fo:font-style="normal" style:text-underline-style="none" fo:font-weight="normal" officeooo:rsid="007e4837" officeooo:paragraph-rsid="0094213b" fo:background-color="transparent"/>
    </style:style>
    <style:style style:name="P156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style:use-window-font-color="true" loext:opacity="0%" fo:language="zxx" fo:country="none" fo:font-style="normal" style:text-underline-style="none" fo:font-weight="normal" officeooo:rsid="007e4837" officeooo:paragraph-rsid="0094213b" fo:background-color="transparent"/>
    </style:style>
    <style:style style:name="P157" style:family="paragraph" style:parent-style-name="Table_20_Contents">
      <style:text-properties fo:color="#ff0000" loext:opacity="100%" officeooo:rsid="0080fb45" officeooo:paragraph-rsid="0094213b"/>
    </style:style>
    <style:style style:name="P158" style:family="paragraph" style:parent-style-name="Heading_20_3" style:list-style-name="">
      <style:text-properties officeooo:paragraph-rsid="009803fc"/>
    </style:style>
    <style:style style:name="P159" style:family="paragraph" style:parent-style-name="Heading_20_3">
      <style:paragraph-properties fo:break-before="page"/>
      <style:text-properties officeooo:paragraph-rsid="009803fc"/>
    </style:style>
    <style:style style:name="P160" style:family="paragraph" style:parent-style-name="Text_20_body">
      <style:text-properties officeooo:paragraph-rsid="009803fc"/>
    </style:style>
    <style:style style:name="P161" style:family="paragraph" style:parent-style-name="Text_20_body">
      <style:text-properties officeooo:rsid="006fb5b2" officeooo:paragraph-rsid="009803fc"/>
    </style:style>
    <style:style style:name="P162" style:family="paragraph" style:parent-style-name="Text_20_body">
      <style:paragraph-properties style:writing-mode="lr-tb" style:writing-mode-automatic="false"/>
      <style:text-properties officeooo:rsid="00717755" officeooo:paragraph-rsid="009803fc"/>
    </style:style>
    <style:style style:name="P163" style:family="paragraph" style:parent-style-name="Text_20_body">
      <style:paragraph-properties style:writing-mode="lr-tb" style:writing-mode-automatic="false"/>
      <style:text-properties officeooo:rsid="0082b35f" officeooo:paragraph-rsid="009803fc"/>
    </style:style>
    <style:style style:name="P164" style:family="paragraph" style:parent-style-name="Table_20_Contents">
      <style:paragraph-properties fo:text-align="center" style:justify-single-word="false"/>
      <style:text-properties officeooo:rsid="00881d2c" officeooo:paragraph-rsid="009803fc"/>
    </style:style>
    <style:style style:name="P165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fo:color="#839496" loext:opacity="100%" fo:language="zxx" fo:country="none" fo:font-style="normal" style:text-underline-style="none" fo:font-weight="normal" officeooo:rsid="007e4837" officeooo:paragraph-rsid="009bc83b" fo:background-color="transparent"/>
    </style:style>
    <style:style style:name="P166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style:use-window-font-color="true" loext:opacity="0%" fo:language="zxx" fo:country="none" fo:font-style="normal" style:text-underline-style="none" fo:font-weight="normal" officeooo:rsid="007e4837" officeooo:paragraph-rsid="009bc83b" fo:background-color="transparent"/>
    </style:style>
    <style:style style:name="P167" style:family="paragraph" style:parent-style-name="Table_20_Contents">
      <style:text-properties officeooo:rsid="007cfc64" officeooo:paragraph-rsid="009803fc"/>
    </style:style>
    <style:style style:name="P168" style:family="paragraph" style:parent-style-name="Table_20_Contents">
      <style:text-properties officeooo:rsid="007d4b99" officeooo:paragraph-rsid="009803fc"/>
    </style:style>
    <style:style style:name="P169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fo:color="#839496" loext:opacity="100%" fo:language="zxx" fo:country="none" fo:font-style="normal" style:text-underline-style="none" fo:font-weight="normal" officeooo:rsid="007e4837" officeooo:paragraph-rsid="009803fc" fo:background-color="transparent"/>
    </style:style>
    <style:style style:name="P170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style:use-window-font-color="true" loext:opacity="0%" fo:language="zxx" fo:country="none" fo:font-style="normal" style:text-underline-style="none" fo:font-weight="normal" officeooo:rsid="007e4837" officeooo:paragraph-rsid="009803fc" fo:background-color="transparent"/>
    </style:style>
    <style:style style:name="P171" style:family="paragraph" style:parent-style-name="Table_20_Contents">
      <style:text-properties officeooo:rsid="0080fb45" officeooo:paragraph-rsid="009803fc"/>
    </style:style>
    <style:style style:name="P172" style:family="paragraph" style:parent-style-name="Heading_20_3" style:list-style-name="">
      <style:text-properties officeooo:paragraph-rsid="0098dfe8"/>
    </style:style>
    <style:style style:name="P173" style:family="paragraph" style:parent-style-name="Heading_20_3">
      <style:paragraph-properties fo:break-before="page"/>
      <style:text-properties officeooo:paragraph-rsid="0098dfe8"/>
    </style:style>
    <style:style style:name="P174" style:family="paragraph" style:parent-style-name="Text_20_body">
      <style:text-properties officeooo:paragraph-rsid="0098dfe8"/>
    </style:style>
    <style:style style:name="P175" style:family="paragraph" style:parent-style-name="Text_20_body">
      <style:text-properties officeooo:rsid="006fb5b2" officeooo:paragraph-rsid="0098dfe8"/>
    </style:style>
    <style:style style:name="P176" style:family="paragraph" style:parent-style-name="Text_20_body">
      <style:paragraph-properties style:writing-mode="lr-tb" style:writing-mode-automatic="false"/>
      <style:text-properties officeooo:rsid="00717755" officeooo:paragraph-rsid="0098dfe8"/>
    </style:style>
    <style:style style:name="P177" style:family="paragraph" style:parent-style-name="Text_20_body">
      <style:paragraph-properties style:writing-mode="lr-tb" style:writing-mode-automatic="false"/>
      <style:text-properties officeooo:rsid="0082b35f" officeooo:paragraph-rsid="0098dfe8"/>
    </style:style>
    <style:style style:name="P178" style:family="paragraph" style:parent-style-name="Text_20_body">
      <style:paragraph-properties style:writing-mode="lr-tb" style:writing-mode-automatic="false"/>
      <style:text-properties fo:font-weight="bold" officeooo:rsid="009f3164" officeooo:paragraph-rsid="009f3164" style:font-weight-asian="bold" style:font-weight-complex="bold"/>
    </style:style>
    <style:style style:name="P179" style:family="paragraph" style:parent-style-name="Table_20_Contents">
      <style:paragraph-properties fo:text-align="center" style:justify-single-word="false"/>
      <style:text-properties officeooo:rsid="009ef785" officeooo:paragraph-rsid="009ef785"/>
    </style:style>
    <style:style style:name="P180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 style:writing-mode="lr-tb" style:writing-mode-automatic="false"/>
      <style:text-properties fo:color="#839496" loext:opacity="100%" fo:language="zxx" fo:country="none" fo:font-style="normal" style:text-underline-style="none" fo:font-weight="normal" officeooo:rsid="007e4837" officeooo:paragraph-rsid="009ad774" fo:background-color="transparent"/>
    </style:style>
    <style:style style:name="P181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 style:writing-mode="lr-tb" style:writing-mode-automatic="false"/>
      <style:text-properties fo:color="#839496" loext:opacity="100%" fo:language="zxx" fo:country="none" fo:font-style="normal" style:text-underline-style="none" fo:font-weight="normal" officeooo:rsid="009f3164" officeooo:paragraph-rsid="009f3164" fo:background-color="transparent"/>
    </style:style>
    <style:style style:name="P182" style:family="paragraph" style:parent-style-name="Table_20_Contents">
      <style:text-properties officeooo:rsid="007cfc64" officeooo:paragraph-rsid="0098dfe8"/>
    </style:style>
    <style:style style:name="P183" style:family="paragraph" style:parent-style-name="Table_20_Contents">
      <style:text-properties officeooo:rsid="007d4b99" officeooo:paragraph-rsid="0098dfe8"/>
    </style:style>
    <style:style style:name="P184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fo:color="#839496" loext:opacity="100%" fo:language="zxx" fo:country="none" fo:font-style="normal" style:text-underline-style="none" fo:font-weight="normal" officeooo:rsid="007e4837" officeooo:paragraph-rsid="0098dfe8" fo:background-color="transparent"/>
    </style:style>
    <style:style style:name="P185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style:use-window-font-color="true" loext:opacity="0%" fo:language="zxx" fo:country="none" fo:font-style="normal" style:text-underline-style="none" fo:font-weight="normal" officeooo:rsid="007e4837" officeooo:paragraph-rsid="0098dfe8" fo:background-color="transparent"/>
    </style:style>
    <style:style style:name="P186" style:family="paragraph" style:parent-style-name="Table_20_Contents">
      <style:text-properties officeooo:rsid="0080fb45" officeooo:paragraph-rsid="0098dfe8"/>
    </style:style>
    <style:style style:name="P187" style:family="paragraph" style:parent-style-name="Heading_20_2" style:list-style-name="">
      <style:text-properties officeooo:rsid="00b64794" officeooo:paragraph-rsid="00b64794"/>
    </style:style>
    <style:style style:name="P188" style:family="paragraph" style:parent-style-name="Heading_20_2">
      <style:paragraph-properties fo:break-before="page"/>
      <style:text-properties officeooo:rsid="00b64794" officeooo:paragraph-rsid="00b64794"/>
    </style:style>
    <style:style style:name="P189" style:family="paragraph" style:parent-style-name="Heading_20_3">
      <style:text-properties officeooo:paragraph-rsid="00b7877a"/>
    </style:style>
    <style:style style:name="P190" style:family="paragraph" style:parent-style-name="Text_20_body">
      <style:text-properties officeooo:paragraph-rsid="00b7877a"/>
    </style:style>
    <style:style style:name="P191" style:family="paragraph" style:parent-style-name="Text_20_body">
      <style:text-properties officeooo:rsid="006fb5b2" officeooo:paragraph-rsid="00b7877a"/>
    </style:style>
    <style:style style:name="P192" style:family="paragraph" style:parent-style-name="Text_20_body">
      <style:paragraph-properties style:writing-mode="lr-tb" style:writing-mode-automatic="false"/>
      <style:text-properties officeooo:rsid="00717755" officeooo:paragraph-rsid="00b7877a"/>
    </style:style>
    <style:style style:name="P193" style:family="paragraph" style:parent-style-name="Text_20_body">
      <style:paragraph-properties style:writing-mode="lr-tb" style:writing-mode-automatic="false"/>
      <style:text-properties officeooo:rsid="0082b35f" officeooo:paragraph-rsid="00b7877a"/>
    </style:style>
    <style:style style:name="P194" style:family="paragraph" style:parent-style-name="Text_20_body">
      <style:paragraph-properties style:writing-mode="lr-tb" style:writing-mode-automatic="false"/>
      <style:text-properties fo:color="#ff0000" loext:opacity="100%" fo:font-weight="bold" officeooo:rsid="009f3164" officeooo:paragraph-rsid="00b7877a" style:font-weight-asian="bold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officeooo:rsid="00b9efb5" officeooo:paragraph-rsid="00b9efb5"/>
    </style:style>
    <style:style style:name="P196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 style:writing-mode="lr-tb" style:writing-mode-automatic="false"/>
      <style:text-properties fo:color="#839496" loext:opacity="100%" fo:language="zxx" fo:country="none" fo:font-style="normal" style:text-underline-style="none" fo:font-weight="normal" officeooo:rsid="009f3164" officeooo:paragraph-rsid="00b7877a" fo:background-color="transparent"/>
    </style:style>
    <style:style style:name="P197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 style:writing-mode="lr-tb" style:writing-mode-automatic="false"/>
      <style:text-properties style:use-window-font-color="true" loext:opacity="0%" fo:language="zxx" fo:country="none" fo:font-style="normal" style:text-underline-style="none" fo:font-weight="normal" officeooo:rsid="009f3164" officeooo:paragraph-rsid="00b7877a" fo:background-color="transparent"/>
    </style:style>
    <style:style style:name="P198" style:family="paragraph" style:parent-style-name="Table_20_Contents">
      <style:text-properties officeooo:rsid="007cfc64" officeooo:paragraph-rsid="00b7877a"/>
    </style:style>
    <style:style style:name="P199" style:family="paragraph" style:parent-style-name="Table_20_Contents">
      <style:text-properties officeooo:rsid="007d4b99" officeooo:paragraph-rsid="00b7877a"/>
    </style:style>
    <style:style style:name="P200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fo:color="#839496" loext:opacity="100%" fo:language="zxx" fo:country="none" fo:font-style="normal" style:text-underline-style="none" fo:font-weight="normal" officeooo:rsid="007e4837" officeooo:paragraph-rsid="00b7877a" fo:background-color="transparent"/>
    </style:style>
    <style:style style:name="P201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style:use-window-font-color="true" loext:opacity="0%" fo:language="zxx" fo:country="none" fo:font-style="normal" style:text-underline-style="none" fo:font-weight="normal" officeooo:rsid="007e4837" officeooo:paragraph-rsid="00b7877a" fo:background-color="transparent"/>
    </style:style>
    <style:style style:name="P202" style:family="paragraph" style:parent-style-name="Table_20_Contents">
      <style:text-properties officeooo:rsid="0080fb45" officeooo:paragraph-rsid="00b7877a"/>
    </style:style>
    <style:style style:name="P203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fo:color="#839496" loext:opacity="100%" fo:language="zxx" fo:country="none" fo:font-style="normal" style:text-underline-style="none" fo:font-weight="normal" officeooo:rsid="007e4837" officeooo:paragraph-rsid="00b8a4c6" fo:background-color="transparent"/>
    </style:style>
    <style:style style:name="P204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style:use-window-font-color="true" loext:opacity="0%" fo:language="zxx" fo:country="none" fo:font-style="normal" style:text-underline-style="none" fo:font-weight="normal" officeooo:rsid="007e4837" officeooo:paragraph-rsid="00b8a4c6" fo:background-color="transparent"/>
    </style:style>
    <style:style style:name="P205" style:family="paragraph" style:parent-style-name="Heading_20_2" style:list-style-name="">
      <style:text-properties officeooo:rsid="00b64794" officeooo:paragraph-rsid="00be4d55"/>
    </style:style>
    <style:style style:name="P206" style:family="paragraph" style:parent-style-name="Heading_20_2">
      <style:paragraph-properties fo:break-before="page"/>
      <style:text-properties officeooo:rsid="00b64794" officeooo:paragraph-rsid="00be4d55"/>
    </style:style>
    <style:style style:name="P207" style:family="paragraph" style:parent-style-name="Heading_20_3">
      <style:paragraph-properties style:writing-mode="lr-tb" style:writing-mode-automatic="false"/>
      <style:text-properties officeooo:paragraph-rsid="00be4d55"/>
    </style:style>
    <style:style style:name="P208" style:family="paragraph" style:parent-style-name="Text_20_body">
      <style:text-properties officeooo:paragraph-rsid="00be4d55"/>
    </style:style>
    <style:style style:name="P209" style:family="paragraph" style:parent-style-name="Text_20_body">
      <style:text-properties officeooo:rsid="006fb5b2" officeooo:paragraph-rsid="00be4d55"/>
    </style:style>
    <style:style style:name="P210" style:family="paragraph" style:parent-style-name="Text_20_body">
      <style:paragraph-properties style:writing-mode="lr-tb" style:writing-mode-automatic="false"/>
      <style:text-properties officeooo:rsid="00717755" officeooo:paragraph-rsid="00be4d55"/>
    </style:style>
    <style:style style:name="P211" style:family="paragraph" style:parent-style-name="Text_20_body">
      <style:paragraph-properties style:writing-mode="lr-tb" style:writing-mode-automatic="false"/>
      <style:text-properties officeooo:rsid="0082b35f" officeooo:paragraph-rsid="00be4d55"/>
    </style:style>
    <style:style style:name="P212" style:family="paragraph" style:parent-style-name="Text_20_body">
      <style:paragraph-properties style:writing-mode="lr-tb" style:writing-mode-automatic="false"/>
      <style:text-properties fo:color="#ff0000" loext:opacity="100%" fo:font-weight="bold" officeooo:rsid="009f3164" officeooo:paragraph-rsid="00be4d55" style:font-weight-asian="bold" style:font-weight-complex="bold"/>
    </style:style>
    <style:style style:name="P213" style:family="paragraph" style:parent-style-name="Table_20_Contents">
      <style:paragraph-properties fo:text-align="center" style:justify-single-word="false"/>
      <style:text-properties officeooo:rsid="00b9efb5" officeooo:paragraph-rsid="00be4d55"/>
    </style:style>
    <style:style style:name="P214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 style:writing-mode="lr-tb" style:writing-mode-automatic="false"/>
      <style:text-properties fo:color="#839496" loext:opacity="100%" fo:language="zxx" fo:country="none" fo:font-style="normal" style:text-underline-style="none" fo:font-weight="normal" officeooo:rsid="009f3164" officeooo:paragraph-rsid="00be4d55" fo:background-color="transparent"/>
    </style:style>
    <style:style style:name="P215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 style:writing-mode="lr-tb" style:writing-mode-automatic="false"/>
      <style:text-properties style:use-window-font-color="true" loext:opacity="0%" fo:language="zxx" fo:country="none" fo:font-style="normal" style:text-underline-style="none" fo:font-weight="normal" officeooo:rsid="009f3164" officeooo:paragraph-rsid="00be4d55" fo:background-color="transparent"/>
    </style:style>
    <style:style style:name="P216" style:family="paragraph" style:parent-style-name="Table_20_Contents">
      <style:text-properties officeooo:rsid="007cfc64" officeooo:paragraph-rsid="00be4d55"/>
    </style:style>
    <style:style style:name="P217" style:family="paragraph" style:parent-style-name="Table_20_Contents">
      <style:text-properties officeooo:rsid="007d4b99" officeooo:paragraph-rsid="00be4d55"/>
    </style:style>
    <style:style style:name="P218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fo:color="#839496" loext:opacity="100%" fo:language="zxx" fo:country="none" fo:font-style="normal" style:text-underline-style="none" fo:font-weight="normal" officeooo:rsid="007e4837" officeooo:paragraph-rsid="00be4d55" fo:background-color="transparent"/>
    </style:style>
    <style:style style:name="P219" style:family="paragraph" style:parent-style-name="Table_20_Contents">
      <loext:graphic-properties draw:fill="solid" draw:fill-color="#002b36" draw:opacity="100%"/>
      <style:paragraph-properties ch2_options="{'Style': 'solarized-dark', 'Language': 'JSON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style:use-window-font-color="true" loext:opacity="0%" fo:language="zxx" fo:country="none" fo:font-style="normal" style:text-underline-style="none" fo:font-weight="normal" officeooo:rsid="007e4837" officeooo:paragraph-rsid="00be4d55" fo:background-color="transparent"/>
    </style:style>
    <style:style style:name="P220" style:family="paragraph" style:parent-style-name="Table_20_Contents">
      <style:text-properties officeooo:rsid="0080fb45" officeooo:paragraph-rsid="00be4d55"/>
    </style:style>
    <style:style style:name="P221" style:family="paragraph" style:parent-style-name="Heading_20_1" style:list-style-name="">
      <style:paragraph-properties fo:break-before="page"/>
      <style:text-properties officeooo:rsid="00e72742" officeooo:paragraph-rsid="00e72742"/>
    </style:style>
    <style:style style:name="P222" style:family="paragraph" style:parent-style-name="Text_20_body">
      <loext:graphic-properties draw:fill="solid" draw:fill-color="#002b36" draw:opacity="100%"/>
      <style:paragraph-properties ch2_options="{'Style': 'solarized-dark', 'Language': 'YAML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23" style:family="paragraph" style:parent-style-name="Text_20_body">
      <loext:graphic-properties draw:fill="solid" draw:fill-color="#002b36" draw:opacity="100%"/>
      <style:paragraph-properties ch2_options="{'Style': 'solarized-dark', 'Language': 'YAML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fo:color="#839496" loext:opacity="100%" fo:language="zxx" fo:country="none" fo:font-style="normal" style:text-underline-style="none" fo:font-weight="normal" fo:background-color="transparent"/>
    </style:style>
    <style:style style:name="P224" style:family="paragraph" style:parent-style-name="Heading_20_2">
      <style:text-properties officeooo:rsid="00d936d1" officeooo:paragraph-rsid="00d936d1"/>
    </style:style>
    <style:style style:name="P225" style:family="paragraph" style:parent-style-name="Text_20_body">
      <style:text-properties officeooo:rsid="00d936d1" officeooo:paragraph-rsid="00d936d1"/>
    </style:style>
    <style:style style:name="P226" style:family="paragraph" style:parent-style-name="Header_20_and_20_Footer">
      <loext:graphic-properties draw:fill="solid" draw:fill-color="#002b36" draw:opacity="100%"/>
      <style:paragraph-properties ch2_options="{'Style': 'solarized-dark', 'Language': 'Bash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style:use-window-font-color="true" loext:opacity="0%" fo:language="zxx" fo:country="none" fo:font-style="normal" style:text-underline-style="none" fo:font-weight="normal" officeooo:paragraph-rsid="00da2a35" fo:background-color="transparent"/>
    </style:style>
    <style:style style:name="P227" style:family="paragraph" style:parent-style-name="Text_20_body">
      <style:text-properties officeooo:rsid="00da2a35" officeooo:paragraph-rsid="00da2a35"/>
    </style:style>
    <style:style style:name="P228" style:family="paragraph" style:parent-style-name="Text_20_body">
      <style:text-properties officeooo:rsid="00da2a35" officeooo:paragraph-rsid="00da4a92"/>
    </style:style>
    <style:style style:name="P229" style:family="paragraph" style:parent-style-name="Text_20_body">
      <style:paragraph-properties style:writing-mode="lr-tb" style:writing-mode-automatic="false"/>
      <style:text-properties officeooo:rsid="00da2a35" officeooo:paragraph-rsid="00da2a35"/>
    </style:style>
    <style:style style:name="P230" style:family="paragraph" style:parent-style-name="Text_20_body">
      <style:paragraph-properties style:writing-mode="lr-tb" style:writing-mode-automatic="false"/>
      <style:text-properties officeooo:rsid="00da2a35" officeooo:paragraph-rsid="00da4a92"/>
    </style:style>
    <style:style style:name="P231" style:family="paragraph" style:parent-style-name="Text_20_body">
      <style:paragraph-properties style:writing-mode="lr-tb" style:writing-mode-automatic="false"/>
      <style:text-properties officeooo:rsid="00da4a92" officeooo:paragraph-rsid="00da4a92"/>
    </style:style>
    <style:style style:name="P232" style:family="paragraph" style:parent-style-name="Heading_20_2">
      <style:text-properties officeooo:paragraph-rsid="00dacc79"/>
    </style:style>
    <style:style style:name="P233" style:family="paragraph" style:parent-style-name="Standard">
      <loext:graphic-properties draw:fill="solid" draw:fill-color="#002b36" draw:opacity="100%"/>
      <style:paragraph-properties fo:background-color="#002b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34" style:family="paragraph" style:parent-style-name="Text_20_body">
      <loext:graphic-properties draw:fill="solid" draw:fill-color="#002b36" draw:opacity="100%"/>
      <style:paragraph-properties ch2_options="{'Style': 'solarized-dark', 'Language': 'Bash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style:use-window-font-color="true" loext:opacity="0%" fo:language="zxx" fo:country="none" fo:font-style="normal" style:text-underline-style="none" fo:font-weight="normal" officeooo:paragraph-rsid="00dacc79" fo:background-color="transparent"/>
    </style:style>
    <style:style style:name="P235" style:family="paragraph" style:parent-style-name="Text_20_body">
      <loext:graphic-properties draw:fill="solid" draw:fill-color="#002b36" draw:opacity="100%"/>
      <style:paragraph-properties ch2_options="{'Style': 'solarized-dark', 'Language': 'Bash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fo:color="#586e75" loext:opacity="100%" fo:language="zxx" fo:country="none" fo:font-style="italic" style:text-underline-style="none" fo:font-weight="normal" officeooo:rsid="00df6c40" officeooo:paragraph-rsid="00df6c40" fo:background-color="transparent"/>
    </style:style>
    <style:style style:name="P236" style:family="paragraph" style:parent-style-name="Text_20_body">
      <loext:graphic-properties draw:fill="solid" draw:fill-color="#002b36" draw:opacity="100%"/>
      <style:paragraph-properties ch2_options="{'Style': 'solarized-dark', 'Language': 'Bash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style:use-window-font-color="true" loext:opacity="0%" fo:language="zxx" fo:country="none" fo:font-style="normal" style:text-underline-style="none" fo:font-weight="normal" officeooo:paragraph-rsid="00e0de2f" fo:background-color="transparent"/>
    </style:style>
    <style:style style:name="P237" style:family="paragraph" style:parent-style-name="Text_20_body">
      <loext:graphic-properties draw:fill="solid" draw:fill-color="#002b36" draw:opacity="100%"/>
      <style:paragraph-properties ch2_options="{'Style': 'solarized-dark', 'Language': 'Bash', 'UseCharStyles': 0, 'LineNumberRatio': 100, 'LineNumberStart': 1, 'MasterCharStyle': '', 'ShowLineNumbers': 0, 'ColourizeBackground': 1, 'LineNumberSeparator': '  ', 'LineNumberPaddingSymbol': '', 'StoreOptionsWithSnippet': 1}" fo:background-color="#002b36"/>
      <style:text-properties fo:color="#839496" loext:opacity="100%" fo:language="zxx" fo:country="none" fo:font-style="normal" style:text-underline-style="none" fo:font-weight="normal" officeooo:paragraph-rsid="00dacc79" fo:background-color="transparent"/>
    </style:style>
    <style:style style:name="P238" style:family="paragraph" style:parent-style-name="Text_20_body">
      <style:text-properties officeooo:paragraph-rsid="00e0de2f"/>
    </style:style>
    <style:style style:name="T1" style:family="text">
      <style:text-properties officeooo:rsid="00228a8d"/>
    </style:style>
    <style:style style:name="T2" style:family="text">
      <style:text-properties officeooo:rsid="001a81f9"/>
    </style:style>
    <style:style style:name="T3" style:family="text">
      <style:text-properties officeooo:rsid="001b7f53"/>
    </style:style>
    <style:style style:name="T4" style:family="text">
      <style:text-properties officeooo:rsid="00280817"/>
    </style:style>
    <style:style style:name="T5" style:family="text">
      <style:text-properties fo:color="#ff0000" loext:opacity="100%" officeooo:rsid="00280817"/>
    </style:style>
    <style:style style:name="T6" style:family="text">
      <style:text-properties officeooo:rsid="002a9c5a"/>
    </style:style>
    <style:style style:name="T7" style:family="text">
      <style:text-properties officeooo:rsid="002b18e9"/>
    </style:style>
    <style:style style:name="T8" style:family="text">
      <style:text-properties officeooo:rsid="005ab079"/>
    </style:style>
    <style:style style:name="T9" style:family="text">
      <style:text-properties officeooo:rsid="002c2d5f"/>
    </style:style>
    <style:style style:name="T10" style:family="text">
      <style:text-properties officeooo:rsid="002e17ed"/>
    </style:style>
    <style:style style:name="T11" style:family="text">
      <style:text-properties officeooo:rsid="0030a752"/>
    </style:style>
    <style:style style:name="T12" style:family="text">
      <style:text-properties fo:font-style="italic" officeooo:rsid="0030a752" style:font-style-asian="italic" style:font-style-complex="italic"/>
    </style:style>
    <style:style style:name="T13" style:family="text">
      <style:text-properties officeooo:rsid="00318232"/>
    </style:style>
    <style:style style:name="T14" style:family="text">
      <style:text-properties officeooo:rsid="0032469b"/>
    </style:style>
    <style:style style:name="T15" style:family="text">
      <style:text-properties officeooo:rsid="003ca902"/>
    </style:style>
    <style:style style:name="T16" style:family="text">
      <style:text-properties officeooo:rsid="003580ea"/>
    </style:style>
    <style:style style:name="T17" style:family="text">
      <style:text-properties officeooo:rsid="0036d809"/>
    </style:style>
    <style:style style:name="T18" style:family="text">
      <style:text-properties officeooo:rsid="003b9fcf"/>
    </style:style>
    <style:style style:name="T19" style:family="text">
      <style:text-properties officeooo:rsid="0055c44d"/>
    </style:style>
    <style:style style:name="T20" style:family="text">
      <style:text-properties officeooo:rsid="0057920c"/>
    </style:style>
    <style:style style:name="T21" style:family="text">
      <style:text-properties officeooo:rsid="003e7a3d"/>
    </style:style>
    <style:style style:name="T22" style:family="text">
      <style:text-properties officeooo:rsid="0045f988"/>
    </style:style>
    <style:style style:name="T23" style:family="text">
      <style:text-properties officeooo:rsid="004011c8"/>
    </style:style>
    <style:style style:name="T24" style:family="text">
      <style:text-properties officeooo:rsid="0042f4aa"/>
    </style:style>
    <style:style style:name="T25" style:family="text">
      <style:text-properties officeooo:rsid="00416abc"/>
    </style:style>
    <style:style style:name="T26" style:family="text">
      <style:text-properties officeooo:rsid="004320ee"/>
    </style:style>
    <style:style style:name="T27" style:family="text">
      <style:text-properties officeooo:rsid="00449c9c"/>
    </style:style>
    <style:style style:name="T28" style:family="text">
      <style:text-properties officeooo:rsid="00438c8f"/>
    </style:style>
    <style:style style:name="T29" style:family="text">
      <style:text-properties officeooo:rsid="00528fcc"/>
    </style:style>
    <style:style style:name="T30" style:family="text">
      <style:text-properties officeooo:rsid="0054c509"/>
    </style:style>
    <style:style style:name="T31" style:family="text">
      <style:text-properties officeooo:rsid="005415a6"/>
    </style:style>
    <style:style style:name="T32" style:family="text">
      <style:text-properties officeooo:rsid="00489d90"/>
    </style:style>
    <style:style style:name="T33" style:family="text">
      <style:text-properties style:font-name="Liberation Serif" officeooo:rsid="001abe44"/>
    </style:style>
    <style:style style:name="T34" style:family="text">
      <style:text-properties style:font-name="Liberation Serif"/>
    </style:style>
    <style:style style:name="T35" style:family="text">
      <style:text-properties officeooo:rsid="004eede3"/>
    </style:style>
    <style:style style:name="T36" style:family="text">
      <style:text-properties officeooo:rsid="0051070f"/>
    </style:style>
    <style:style style:name="T37" style:family="text">
      <style:text-properties officeooo:rsid="0050802d"/>
    </style:style>
    <style:style style:name="T38" style:family="text">
      <style:text-properties officeooo:rsid="00cbc44a"/>
    </style:style>
    <style:style style:name="T39" style:family="text">
      <style:text-properties officeooo:rsid="00c8d63f"/>
    </style:style>
    <style:style style:name="T40" style:family="text">
      <style:text-properties officeooo:rsid="00c2157a"/>
    </style:style>
    <style:style style:name="T41" style:family="text">
      <style:text-properties officeooo:rsid="00c731d0"/>
    </style:style>
    <style:style style:name="T42" style:family="text">
      <style:text-properties officeooo:rsid="00c65f21"/>
    </style:style>
    <style:style style:name="T43" style:family="text">
      <style:text-properties fo:color="#2a6099" loext:opacity="100%"/>
    </style:style>
    <style:style style:name="T44" style:family="text">
      <style:text-properties officeooo:rsid="006112c0"/>
    </style:style>
    <style:style style:name="T45" style:family="text">
      <style:text-properties officeooo:rsid="00691af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color="#ff0000" loext:opacity="100%"/>
    </style:style>
    <style:style style:name="T48" style:family="text">
      <style:text-properties fo:color="#ff0000" loext:opacity="100%" fo:font-weight="bold" style:font-weight-asian="bold" style:font-weight-complex="bold"/>
    </style:style>
    <style:style style:name="T49" style:family="text">
      <style:text-properties fo:color="#000000" loext:opacity="100%" officeooo:rsid="00878256"/>
    </style:style>
    <style:style style:name="T50" style:family="text">
      <style:text-properties officeooo:rsid="007cfc64"/>
    </style:style>
    <style:style style:name="T51" style:family="text">
      <style:text-properties officeooo:rsid="0084abbb"/>
    </style:style>
    <style:style style:name="T52" style:family="text">
      <style:text-properties officeooo:rsid="0085d992"/>
    </style:style>
    <style:style style:name="T53" style:family="text">
      <style:text-properties fo:color="#839496" loext:opacity="100%"/>
    </style:style>
    <style:style style:name="T54" style:family="text">
      <style:text-properties fo:color="#268bd2" loext:opacity="100%"/>
    </style:style>
    <style:style style:name="T55" style:family="text">
      <style:text-properties fo:color="#2aa198" loext:opacity="100%"/>
    </style:style>
    <style:style style:name="T56" style:family="text">
      <style:text-properties fo:color="#586e75" loext:opacity="100%" fo:font-style="italic"/>
    </style:style>
    <style:style style:name="T57" style:family="text">
      <style:text-properties fo:color="#839496" loext:opacity="100%" fo:font-style="normal" style:text-underline-style="none" fo:font-weight="normal"/>
    </style:style>
    <style:style style:name="T58" style:family="text">
      <style:text-properties fo:color="#2aa198" loext:opacity="100%" officeooo:rsid="00827c37"/>
    </style:style>
    <style:style style:name="T59" style:family="text">
      <style:text-properties fo:color="#2aa198" loext:opacity="100%" officeooo:rsid="0082b35f"/>
    </style:style>
    <style:style style:name="T60" style:family="text">
      <style:text-properties officeooo:rsid="008afe2b"/>
    </style:style>
    <style:style style:name="T61" style:family="text">
      <style:text-properties officeooo:rsid="008d0c76"/>
    </style:style>
    <style:style style:name="T62" style:family="text">
      <style:text-properties officeooo:rsid="008ddb82"/>
    </style:style>
    <style:style style:name="T63" style:family="text">
      <style:text-properties officeooo:rsid="009803fc"/>
    </style:style>
    <style:style style:name="T64" style:family="text">
      <style:text-properties fo:color="#000000" loext:opacity="100%"/>
    </style:style>
    <style:style style:name="T65" style:family="text">
      <style:text-properties officeooo:rsid="009d0321"/>
    </style:style>
    <style:style style:name="T66" style:family="text">
      <style:text-properties officeooo:rsid="009ef785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officeooo:rsid="00b9efb5"/>
    </style:style>
    <style:style style:name="T69" style:family="text">
      <style:text-properties officeooo:rsid="00bf1797"/>
    </style:style>
    <style:style style:name="T70" style:family="text">
      <style:text-properties fo:font-weight="bold" officeooo:rsid="00da4a92" style:font-weight-asian="bold" style:font-weight-complex="bold"/>
    </style:style>
    <style:style style:name="T71" style:family="text">
      <style:text-properties officeooo:rsid="00da4a92"/>
    </style:style>
    <style:style style:name="T72" style:family="text">
      <style:text-properties fo:color="#586e75" loext:opacity="100%"/>
    </style:style>
    <style:style style:name="T73" style:family="text">
      <style:text-properties fo:color="#586e75" loext:opacity="100%" fo:font-style="italic" officeooo:rsid="00df6c40"/>
    </style:style>
    <style:style style:name="T74" style:family="text">
      <style:text-properties fo:color="#586e75" loext:opacity="100%" fo:font-style="italic" officeooo:rsid="00e0de2f"/>
    </style:style>
    <style:style style:name="T75" style:family="text">
      <style:text-properties fo:color="#586e75" loext:opacity="100%" fo:font-style="italic" officeooo:rsid="00e180af"/>
    </style:style>
    <style:style style:name="T76" style:family="text">
      <style:text-properties fo:color="#586e75" loext:opacity="100%" fo:font-style="italic" officeooo:rsid="00e433d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406_1539992130"/>Application web PHP Gestion horaire Familles / Ménages<text:bookmark-end text:name="__RefHeading___Toc1406_1539992130"/>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"><text:a xlink:type="simple" xlink:href="#__RefHeading___Toc1421_1539992130" office:name="Définition des besoins" text:style-name="Index_20_Link" text:visited-style-name="Index_20_Link">Définition des besoins<text:tab/>2</text:a></text:p>
          <text:p text:style-name="P2"><text:a xlink:type="simple" xlink:href="#__RefHeading___Toc733_2308554119" office:name="Besoins utilisateurs :" text:style-name="Index_20_Link" text:visited-style-name="Index_20_Link">Besoins utilisateurs :<text:tab/>2</text:a></text:p>
          <text:p text:style-name="P2"><text:a xlink:type="simple" xlink:href="#__RefHeading___Toc735_2308554119" office:name="Besoins fonctionnalités :" text:style-name="Index_20_Link" text:visited-style-name="Index_20_Link">Besoins fonctionnalités :<text:tab/>2</text:a></text:p>
          <text:p text:style-name="P1"><text:a xlink:type="simple" xlink:href="#__RefHeading___Toc737_2308554119" office:name="États des lieux." text:style-name="Index_20_Link" text:visited-style-name="Index_20_Link">États des lieux.<text:tab/>3</text:a></text:p>
          <text:p text:style-name="P2"><text:a xlink:type="simple" xlink:href="#__RefHeading___Toc1053_2308554119" office:name="Service applicatif" text:style-name="Index_20_Link" text:visited-style-name="Index_20_Link">Service applicatif<text:tab/>3</text:a></text:p>
          <text:p text:style-name="P2"><text:a xlink:type="simple" xlink:href="#__RefHeading___Toc1055_2308554119" office:name="Sécurité" text:style-name="Index_20_Link" text:visited-style-name="Index_20_Link">Sécurité<text:tab/>3</text:a></text:p>
          <text:p text:style-name="P1"><text:a xlink:type="simple" xlink:href="#__RefHeading___Toc1057_2308554119" office:name="Ajout et/ou modification nécessaire" text:style-name="Index_20_Link" text:visited-style-name="Index_20_Link">Ajout et/ou modification nécessaire<text:tab/>4</text:a></text:p>
          <text:p text:style-name="P1"><text:a xlink:type="simple" xlink:href="#__RefHeading___Toc1057_2308554119%20Copie%201" office:name="Documentation CODE" text:style-name="Index_20_Link" text:visited-style-name="Index_20_Link">Documentation CODE<text:tab/>6</text:a></text:p>
          <text:p text:style-name="P2"><text:a xlink:type="simple" xlink:href="#__RefHeading___Toc25436_3350031955" office:name="Contexte" text:style-name="Index_20_Link" text:visited-style-name="Index_20_Link">Contexte<text:tab/>6</text:a></text:p>
          <text:p text:style-name="P2"><text:a xlink:type="simple" xlink:href="#__RefHeading___Toc26977_3350031955" office:name="Service" text:style-name="Index_20_Link" text:visited-style-name="Index_20_Link">Service<text:tab/>6</text:a></text:p>
          <text:p text:style-name="P3"><text:a xlink:type="simple" xlink:href="#__RefHeading___Toc40588_3350031955" office:name="Description" text:style-name="Index_20_Link" text:visited-style-name="Index_20_Link">Description<text:tab/>6</text:a></text:p>
          <text:p text:style-name="P2"><text:a xlink:type="simple" xlink:href="#__RefHeading___Toc26979_3350031955" office:name="Controller" text:style-name="Index_20_Link" text:visited-style-name="Index_20_Link">Controller<text:tab/>7</text:a></text:p>
          <text:p text:style-name="P3"><text:a xlink:type="simple" xlink:href="#__RefHeading___Toc40590_3350031955" office:name="Description" text:style-name="Index_20_Link" text:visited-style-name="Index_20_Link">Description<text:tab/>7</text:a></text:p>
          <text:p text:style-name="P3"><text:a xlink:type="simple" xlink:href="#__RefHeading___Toc30908_3350031955%20Copie%201%20Copie%201" office:name="Diagramme de classe" text:style-name="Index_20_Link" text:visited-style-name="Index_20_Link">Diagramme de classe<text:tab/>7</text:a></text:p>
          <text:p text:style-name="P2"><text:a xlink:type="simple" xlink:href="#__RefHeading___Toc26981_3350031955" office:name="Security" text:style-name="Index_20_Link" text:visited-style-name="Index_20_Link">Security<text:tab/>8</text:a></text:p>
          <text:p text:style-name="P3"><text:a xlink:type="simple" xlink:href="#__RefHeading___Toc30906_3350031955%20Copie%201" office:name="Description" text:style-name="Index_20_Link" text:visited-style-name="Index_20_Link">Description<text:tab/>8</text:a></text:p>
          <text:p text:style-name="P3"><text:a xlink:type="simple" xlink:href="#__RefHeading___Toc30908_3350031955%20Copie%201" office:name="Diagramme de classe" text:style-name="Index_20_Link" text:visited-style-name="Index_20_Link">Diagramme de classe<text:tab/>8</text:a></text:p>
          <text:p text:style-name="P2"><text:a xlink:type="simple" xlink:href="#__RefHeading___Toc26983_3350031955" office:name="PdoApp" text:style-name="Index_20_Link" text:visited-style-name="Index_20_Link">PdoApp<text:tab/>9</text:a></text:p>
          <text:p text:style-name="P3"><text:a xlink:type="simple" xlink:href="#__RefHeading___Toc30906_3350031955" office:name="Description" text:style-name="Index_20_Link" text:visited-style-name="Index_20_Link">Description<text:tab/>9</text:a></text:p>
          <text:p text:style-name="P3"><text:a xlink:type="simple" xlink:href="#__RefHeading___Toc30908_3350031955" office:name="Diagramme de classe" text:style-name="Index_20_Link" text:visited-style-name="Index_20_Link">Diagramme de classe<text:tab/>9</text:a></text:p>
          <text:p text:style-name="P1"><text:a xlink:type="simple" xlink:href="#__RefHeading___Toc1057_2308554119%20Copie%201%20Copie%201" office:name="Documentation API" text:style-name="Index_20_Link" text:visited-style-name="Index_20_Link">Documentation API<text:tab/>10</text:a></text:p>
          <text:p text:style-name="P2"><text:a xlink:type="simple" xlink:href="#__RefHeading___Toc673_3350031955" office:name="Contexte" text:style-name="Index_20_Link" text:visited-style-name="Index_20_Link">Contexte<text:tab/>10</text:a></text:p>
          <text:p text:style-name="P2"><text:a xlink:type="simple" xlink:href="#__RefHeading___Toc5243_3350031955" office:name="Intervenant" text:style-name="Index_20_Link" text:visited-style-name="Index_20_Link">Intervenant<text:tab/>11</text:a></text:p>
          <text:p text:style-name="P3"><text:a xlink:type="simple" xlink:href="#__RefHeading___Toc5245_3350031955" office:name="api_ajout_horaire" text:style-name="Index_20_Link" text:visited-style-name="Index_20_Link">api_ajout_horaire<text:tab/>11</text:a></text:p>
          <text:p text:style-name="P3"><text:a xlink:type="simple" xlink:href="#__RefHeading___Toc13412_3350031955" office:name="api_modifie_horaire" text:style-name="Index_20_Link" text:visited-style-name="Index_20_Link">api_modifie_horaire<text:tab/>12</text:a></text:p>
          <text:p text:style-name="P3"><text:a xlink:type="simple" xlink:href="#__RefHeading___Toc13412_3350031955%20Copie%201" office:name="api_get_modifier_horaire" text:style-name="Index_20_Link" text:visited-style-name="Index_20_Link">api_get_modifier_horaire<text:tab/>13</text:a></text:p>
          <text:p text:style-name="P3"><text:a xlink:type="simple" xlink:href="#__RefHeading___Toc13412_3350031955%20Copie%201%20Copie%201" office:name="api_relever_fiche" text:style-name="Index_20_Link" text:visited-style-name="Index_20_Link">api_relever_fiche<text:tab/>13</text:a></text:p>
          <text:p text:style-name="P3"><text:a xlink:type="simple" xlink:href="#__RefHeading___Toc13412_3350031955%20Copie%202" office:name="api_ajout_heure_de_hors" text:style-name="Index_20_Link" text:visited-style-name="Index_20_Link">api_ajout_heure_de_hors<text:tab/>19</text:a></text:p>
          <text:p text:style-name="P3"><text:a xlink:type="simple" xlink:href="#__RefHeading___Toc13412_3350031955%20Copie%203" office:name="api_signer" text:style-name="Index_20_Link" text:visited-style-name="Index_20_Link">api_signer<text:tab/>20</text:a></text:p>
          <text:p text:style-name="P2"><text:a xlink:type="simple" xlink:href="#__RefHeading___Toc25013_3350031955" office:name="Login" text:style-name="Index_20_Link" text:visited-style-name="Index_20_Link">Login<text:tab/>21</text:a></text:p>
          <text:p text:style-name="P3"><text:a xlink:type="simple" xlink:href="#__RefHeading___Toc13412_3350031955%20Copie%203%20Copie%202" office:name="api_register" text:style-name="Index_20_Link" text:visited-style-name="Index_20_Link">api_register<text:tab/>21</text:a></text:p>
          <text:p text:style-name="P2"><text:a xlink:type="simple" xlink:href="#__RefHeading___Toc25013_3350031955%20Copie%201" office:name="SettingsController" text:style-name="Index_20_Link" text:visited-style-name="Index_20_Link">SettingsController<text:tab/>22</text:a></text:p>
          <text:p text:style-name="P3"><text:a xlink:type="simple" xlink:href="#__RefHeading___Toc13412_3350031955%20Copie%203%20Copie%202%20Copie%201" office:name="change_password_settings" text:style-name="Index_20_Link" text:visited-style-name="Index_20_Link">change_password_settings<text:tab/>22</text:a></text:p>
          <text:p text:style-name="P1"><text:a xlink:type="simple" xlink:href="#__RefHeading___Toc4755_2105714543" office:name="Podman" text:style-name="Index_20_Link" text:visited-style-name="Index_20_Link">Podman<text:tab/>23</text:a></text:p>
          <text:p text:style-name="P1"><text:a xlink:type="simple" xlink:href="#__RefHeading___Toc4499_2105714543" office:name="Déploiement" text:style-name="Index_20_Link" text:visited-style-name="Index_20_Link">Déploiement<text:tab/>25</text:a></text:p>
          <text:p text:style-name="P2"><text:a xlink:type="simple" xlink:href="#__RefHeading___Toc4716_2105714543" office:name="Windows" text:style-name="Index_20_Link" text:visited-style-name="Index_20_Link">Windows<text:tab/>25</text:a></text:p>
          <text:p text:style-name="P2"><text:a xlink:type="simple" xlink:href="#__RefHeading___Toc4718_2105714543" office:name=" Linux" text:style-name="Index_20_Link" text:visited-style-name="Index_20_Link"><text:s/>Linux<text:tab/>25</text:a></text:p>
          <text:p text:style-name="P2"><text:a xlink:type="simple" xlink:href="#__RefHeading___Toc4720_2105714543" office:name="Variable d’environnement" text:style-name="Index_20_Link" text:visited-style-name="Index_20_Link">Variable d’environnement<text:tab/>26</text:a></text:p>
        </text:index-body>
      </text:table-of-content>
      <text:h text:style-name="Heading_20_1" text:outline-level="1" text:is-list-header="true"><text:bookmark-start text:name="__RefHeading___Toc1421_1539992130"/><text:soft-page-break/>Définition des besoins <text:bookmark-end text:name="__RefHeading___Toc1421_1539992130"/></text:h>
      <text:h text:style-name="Heading_20_2" text:outline-level="2"><text:bookmark-start text:name="__RefHeading___Toc733_2308554119"/><text:span text:style-name="T1">Besoins utilisateurs</text:span> :<text:bookmark-end text:name="__RefHeading___Toc733_2308554119"/></text:h>
      <text:list text:style-name="L1">
        <text:list-item>
          <text:p text:style-name="P4">Familles doit pouvoir, déclarer, vérifier et déclarer le respect horaire de l’intervenant</text:p>
          <text:p text:style-name="P5"/>
        </text:list-item>
        <text:list-item>
          <text:p text:style-name="P4">Intervenant doit pouvoir déclarer / vérifier / modifier ces horaires sur une hauteur de 1 semaine</text:p>
          <text:list>
            <text:list-item>
              <text:p text:style-name="P4">Ménage</text:p>
            </text:list-item>
            <text:list-item>
              <text:p text:style-name="P6"><text:span text:style-name="T2">Garde d’enfant </text:span><text:span text:style-name="T3">(Famille occasionnelle / Non occasionnelle)</text:span></text:p>
            </text:list-item>
            <text:list-item>
              <text:p text:style-name="P7">Télécharger, relever d’heure<text:line-break/></text:p>
            </text:list-item>
          </text:list>
        </text:list-item>
        <text:list-item>
          <text:p text:style-name="P8">Administrateur doit pouvoir accès à tous les besoins sans aucune forme de limitation</text:p>
          <text:list>
            <text:list-item>
              <text:p text:style-name="P9">Générer des relevés d’heure <text:span text:style-name="T4">vierge</text:span></text:p>
            </text:list-item>
            <text:list-item>
              <text:p text:style-name="P10">Récapitulatif complet</text:p>
            </text:list-item>
            <text:list-item>
              <text:p text:style-name="P11"><text:span text:style-name="T5">Modifier les tarifications (Non-terminer)</text:span><text:line-break/></text:p>
            </text:list-item>
          </text:list>
        </text:list-item>
      </text:list>
      <text:h text:style-name="Heading_20_2" text:outline-level="2"><text:bookmark-start text:name="__RefHeading___Toc735_2308554119"/>Besoins fonctionnalités :<text:bookmark-end text:name="__RefHeading___Toc735_2308554119"/></text:h>
      <text:list text:style-name="L2">
        <text:list-item>
          <text:p text:style-name="P12">Ménage</text:p>
          <text:list>
            <text:list-item>
              <text:p text:style-name="P12">Temps horaire</text:p>
            </text:list-item>
            <text:list-item>
              <text:p text:style-name="P13">Lieu Allouer / Lieu occasionnel (Aucune différence entre les deux dans l’appli actuelle)</text:p>
            </text:list-item>
          </text:list>
        </text:list-item>
        <text:list-item>
          <text:p text:style-name="P14">Famille</text:p>
          <text:list>
            <text:list-item>
              <text:p text:style-name="P14">Occasionnel / allouer</text:p>
            </text:list-item>
            <text:list-item>
              <text:p text:style-name="P15">Distance parcourue avec enfant</text:p>
            </text:list-item>
            <text:list-item>
              <text:p text:style-name="P15">Temps horaires</text:p>
            </text:list-item>
          </text:list>
        </text:list-item>
      </text:list>
      <text:p text:style-name="P16"/>
      <text:p text:style-name="P16"/>
      <text:h text:style-name="P17" text:outline-level="1"><text:bookmark-start text:name="__RefHeading___Toc737_2308554119"/>État<text:span text:style-name="T6">s</text:span> des lieux.<text:bookmark-end text:name="__RefHeading___Toc737_2308554119"/></text:h>
      <text:h text:style-name="Heading_20_2" text:outline-level="2"><text:bookmark-start text:name="__RefHeading___Toc1053_2308554119"/>Service applicatif<text:bookmark-end text:name="__RefHeading___Toc1053_2308554119"/></text:h>
      <text:p text:style-name="P18">A<text:span text:style-name="T7">pplication avec une logique algorithmique correcte, mais non concrétiser.<text:line-break/>On note des incohérences dans la manière dont les fonctionnalités sont mises en place. </text:span></text:p>
      <text:p text:style-name="P19">Cela ajoute une couche de complexité non nécessaire et ralentie considérablement la maintenance/<text:span text:style-name="T8">compréhension</text:span> du code.</text:p>
      <text:p text:style-name="P20">Le Problème venant <text:span text:style-name="T9">principalement</text:span> d’une structure <text:span text:style-name="T9">MVC </text:span>mal pensée.<text:line-break/><text:span text:style-name="T9">Le problème est que les vues est contrôleur joue exactement le même rôle. </text:span><text:span text:style-name="T10">Ce qui limite fortement la compréhension et la maintenance du code.<text:line-break/><text:line-break/></text:span><text:span text:style-name="T11">Autre inconvenance, il y a beaucoup de « </text:span><text:span text:style-name="T12">bricolage </text:span><text:span text:style-name="T11">», utilisation de variable magique, répétitions du code (Problème, </text:span><text:span text:style-name="T13">on modifie une chose tout casse)</text:span><text:span text:style-name="T11">.<text:line-break/><text:line-break/></text:span><text:span text:style-name="T14">Utilisation de fonctionnalités dite « Interdite ». Cela apporte des limitations considérables et les problèmes suivants.</text:span></text:p>
      <text:list text:style-name="L3">
        <text:list-item>
          <text:p text:style-name="P21">Comportement du service aléatoire</text:p>
        </text:list-item>
        <text:list-item>
          <text:p text:style-name="P21">Peut fonctionner sur une machine x mes pas forcément sûr y.</text:p>
        </text:list-item>
        <text:list-item>
          <text:p text:style-name="P22">Des comportements inattendus sont à prévoir</text:p>
        </text:list-item>
        <text:list-item>
          <text:p text:style-name="P22">En cas de mise à jour de PHP ou autre service risque de casse</text:p>
        </text:list-item>
      </text:list>
      <text:p text:style-name="P23"/>
      <text:h text:style-name="Heading_20_2" text:outline-level="2"><text:bookmark-start text:name="__RefHeading___Toc1055_2308554119"/>Sécurit<text:span text:style-name="T15">é</text:span><text:bookmark-end text:name="__RefHeading___Toc1055_2308554119"/></text:h>
      <text:p text:style-name="P24">Certaines fonctionnalités ne vérifient pas correctement les données et permet les modifications <text:span text:style-name="T16">par </text:span>un <text:span text:style-name="T17">autre utilisateur</text:span>.</text:p>
      <text:p text:style-name="P25">Service exposé sur un environnement de développement <text:span text:style-name="T18">XAMP(windows)</text:span> <text:span text:style-name="T18">sans aucune règles de sécurité </text:span>(Absolument à changer à l’avenir)</text:p>
      <text:p text:style-name="P25"/>
      <text:p text:style-name="P26"/>
      <text:p text:style-name="P26"/>
      <text:p text:style-name="P26"/>
      <text:h text:style-name="P27" text:outline-level="1"><text:bookmark-start text:name="__RefHeading___Toc1057_2308554119"/>Ajout et/ou modification nécessaire<text:bookmark-end text:name="__RefHeading___Toc1057_2308554119"/></text:h>
      <text:p text:style-name="P25"/>
      <text:p text:style-name="P28"><text:span text:style-name="T19">Légendes</text:span> <text:sequence text:ref-name="refTable0" text:name="Table" text:formula="ooow:Table+1" style:num-format="1">1</text:sequence>: <text:line-break/>P = Priorité, <text:span text:style-name="T20">plus le chiffre est bas plus, il est important.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9"/>
          </table:table-cell>
          <table:table-cell table:style-name="Tableau2.B1" office:value-type="string">
            <text:p text:style-name="P30">En attente</text:p>
          </table:table-cell>
        </table:table-row>
        <table:table-row>
          <table:table-cell table:style-name="Tableau2.A2" office:value-type="string">
            <text:p text:style-name="P31"/>
          </table:table-cell>
          <table:table-cell table:style-name="Tableau2.B2" office:value-type="string">
            <text:p text:style-name="P32">En cours</text:p>
          </table:table-cell>
        </table:table-row>
        <table:table-row>
          <table:table-cell table:style-name="Tableau2.A3" office:value-type="string">
            <text:p text:style-name="P31"/>
          </table:table-cell>
          <table:table-cell table:style-name="Tableau2.B2" office:value-type="string">
            <text:p text:style-name="P30">Partiellement fini</text:p>
          </table:table-cell>
        </table:table-row>
        <table:table-row>
          <table:table-cell table:style-name="Tableau2.A4" office:value-type="string">
            <text:p text:style-name="P31"/>
          </table:table-cell>
          <table:table-cell table:style-name="Tableau2.B2" office:value-type="string">
            <text:p text:style-name="P30">Fini</text:p>
          </table:table-cell>
        </table:table-row>
      </table:table>
      <text:p text:style-name="P33"/>
      <table:table table:name="Tableau1" table:style-name="Tableau1" table:template-name="Elegant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4">P</text:p>
          </table:table-cell>
          <table:table-cell table:style-name="Tableau1.A1" office:value-type="string">
            <text:p text:style-name="P35">Ajout/modification</text:p>
          </table:table-cell>
          <table:table-cell table:style-name="Tableau1.A1" office:value-type="string">
            <text:p text:style-name="P36"><text:s/><text:span text:style-name="T21">Raison</text:span></text:p>
          </table:table-cell>
          <table:table-cell table:style-name="Tableau1.A1" office:value-type="string">
            <text:p text:style-name="P37">Solution</text:p>
          </table:table-cell>
          <table:table-cell table:style-name="Tableau1.A1" office:value-type="string">
            <text:p text:style-name="P35"><text:span text:style-name="T22">É</text:span>tat</text:p>
          </table:table-cell>
        </table:table-row>
        <table:table-row table:style-name="Tableau1.2">
          <table:table-cell table:style-name="Tableau1.A2" office:value-type="string">
            <text:p text:style-name="P38">1</text:p>
          </table:table-cell>
          <table:table-cell table:style-name="Tableau1.A2" office:value-type="string">
            <text:p text:style-name="P39">Correction MVC</text:p>
          </table:table-cell>
          <table:table-cell table:style-name="Tableau1.A2" office:value-type="string">
            <text:p text:style-name="P40"><text:s/><text:span text:style-name="T23">Faciliter la </text:span><text:span text:style-name="T24">maintenance </text:span><text:span text:style-name="T23">du code/ Travailler sur une base saine / Limiter les bugs</text:span></text:p>
          </table:table-cell>
          <table:table-cell table:style-name="Tableau1.A2" office:value-type="string">
            <text:p text:style-name="P41"><text:s/><text:span text:style-name="T25">Passer à un routeur symphonie</text:span></text:p>
          </table:table-cell>
          <table:table-cell table:style-name="Tableau1.A2" office:value-type="string">
            <text:p text:style-name="P42">En cours</text:p>
          </table:table-cell>
        </table:table-row>
        <table:table-row table:style-name="Tableau1.2">
          <table:table-cell table:style-name="Tableau1.A3" office:value-type="string">
            <text:p text:style-name="P43">2</text:p>
          </table:table-cell>
          <table:table-cell table:style-name="Tableau1.A3" office:value-type="string">
            <text:p text:style-name="P44"><text:s/><text:span text:style-name="T26">Correction PDF</text:span></text:p>
          </table:table-cell>
          <table:table-cell table:style-name="Tableau1.A3" office:value-type="string">
            <text:p text:style-name="P45"><text:s/><text:span text:style-name="T26">Les pdfs sont générés par image.</text:span></text:p>
            <text:p text:style-name="P43">Ce qui les rend considérablement volumineux et non interactif.</text:p>
            <text:p text:style-name="P43"/>
            <text:p text:style-name="P43">En plus de créer des problèmes de définitions d’écrans</text:p>
          </table:table-cell>
          <table:table-cell table:style-name="Tableau1.A3" office:value-type="string">
            <text:p text:style-name="P43">Utiliser la fonctionnalité dédiée. <text:span text:style-name="T27">Dans le plugin déjà implémenter</text:span></text:p>
          </table:table-cell>
          <table:table-cell table:style-name="Tableau1.A3" office:value-type="string">
            <text:p text:style-name="P46">Fini</text:p>
          </table:table-cell>
        </table:table-row>
        <table:table-row table:style-name="Tableau1.2">
          <table:table-cell table:style-name="Tableau1.A4" office:value-type="string">
            <text:p text:style-name="P47">2</text:p>
          </table:table-cell>
          <table:table-cell table:style-name="Tableau1.A4" office:value-type="string">
            <text:p text:style-name="P47">Enlever la redondance</text:p>
          </table:table-cell>
          <table:table-cell table:style-name="Tableau1.A4" office:value-type="string">
            <text:p text:style-name="P47">Beaucoup de code font exactement la même chose.<text:line-break/>Il faudrai<text:span text:style-name="T28">t faire en sorte que la partie commune soit un seul et même outil. </text:span></text:p>
            <text:p text:style-name="P48">Cela permettra de gagner du temps et limiter / les bugs<text:line-break/><text:line-break/><text:span text:style-name="T29">Exemple le code permettant de générer les PDF est unique alors qu’il pourrai</text:span><text:span text:style-name="T30">t </text:span><text:span text:style-name="T29">être le même à chaque foi</text:span><text:span text:style-name="T31">e</text:span></text:p>
          </table:table-cell>
          <table:table-cell table:style-name="Tableau1.A4" office:value-type="string">
            <text:p text:style-name="P49">Créer des socles communs</text:p>
          </table:table-cell>
          <table:table-cell table:style-name="Tableau1.A4" office:value-type="string">
            <text:p text:style-name="P49">En cours</text:p>
          </table:table-cell>
        </table:table-row>
        <table:table-row>
          <table:table-cell table:style-name="Tableau1.A4" office:value-type="string">
            <text:p text:style-name="P50">5</text:p>
          </table:table-cell>
          <table:table-cell table:style-name="Tableau1.A4" office:value-type="string">
            <text:p text:style-name="P51">Correction des problèmes de logique</text:p>
          </table:table-cell>
          <table:table-cell table:style-name="Tableau1.A4" office:value-type="string">
            <text:p text:style-name="P51">Certaine implémentation sont inutilement compliquées et <text:span text:style-name="T32">rendent la compréhension inutilement compliquer</text:span></text:p>
          </table:table-cell>
          <table:table-cell table:style-name="Tableau1.A4" office:value-type="string">
            <text:p text:style-name="P52">Correction algorithmique</text:p>
          </table:table-cell>
          <table:table-cell table:style-name="Tableau1.A4" office:value-type="string">
            <text:p text:style-name="P53">En <text:span text:style-name="T8">cours</text:span></text:p>
          </table:table-cell>
        </table:table-row>
        <table:table-row>
          <table:table-cell table:style-name="Tableau1.A6" office:value-type="string">
            <text:p text:style-name="P54">3</text:p>
          </table:table-cell>
          <table:table-cell table:style-name="Tableau1.A6" office:value-type="string">
            <text:p text:style-name="P55">Tarif taux horaire</text:p>
          </table:table-cell>
          <table:table-cell table:style-name="Tableau1.A6" office:value-type="string">
            <text:p text:style-name="P55">le tarif taux horaire s’affiche uniquement après le 20 du mois </text:p>
          </table:table-cell>
          <table:table-cell table:style-name="Tableau1.A6" office:value-type="string">
            <text:p text:style-name="P56">Correction algorithmique</text:p>
          </table:table-cell>
          <table:table-cell table:style-name="Tableau1.A6" office:value-type="string">
            <text:p text:style-name="P57">En attente</text:p>
          </table:table-cell>
        </table:table-row>
        <table:table-row table:style-name="Tableau1.2">
          <table:table-cell table:style-name="Tableau1.A6" office:value-type="string">
            <text:p text:style-name="P54">5</text:p>
          </table:table-cell>
          <table:table-cell table:style-name="Tableau1.A6" office:value-type="string">
            <text:p text:style-name="P58"><text:span text:style-name="T33">A</text:span><text:span text:style-name="T34">mélioration CSS</text:span></text:p>
          </table:table-cell>
          <table:table-cell table:style-name="Tableau1.A6" office:value-type="string">
            <text:p text:style-name="P59">en admin la partie « Frais / Remboursement »</text:p>
          </table:table-cell>
          <table:table-cell table:style-name="Tableau1.A6" office:value-type="string">
            <text:p text:style-name="P60">Modifications règles CSS</text:p>
          </table:table-cell>
          <table:table-cell table:style-name="Tableau1.A6" office:value-type="string">
            <text:p text:style-name="P60">En attente</text:p>
          </table:table-cell>
        </table:table-row>
        <table:table-row table:style-name="Tableau1.8">
          <table:table-cell table:style-name="Tableau1.A3" office:value-type="string">
            <text:p text:style-name="P61">5</text:p>
          </table:table-cell>
          <table:table-cell table:style-name="Tableau1.A3" office:value-type="string">
            <text:p text:style-name="P62"><text:span text:style-name="T33">A</text:span><text:span text:style-name="T34">mélioration CSS</text:span></text:p>
          </table:table-cell>
          <table:table-cell table:style-name="Tableau1.A3" office:value-type="string">
            <text:p text:style-name="P63">en famille la partie « Questionnaire de satisfaction et signature »</text:p>
          </table:table-cell>
          <table:table-cell table:style-name="Tableau1.A3" office:value-type="string">
            <text:p text:style-name="P64">Modifications règles CSS</text:p>
          </table:table-cell>
          <table:table-cell table:style-name="Tableau1.A3" office:value-type="string">
            <text:p text:style-name="P65">En attente</text:p>
          </table:table-cell>
        </table:table-row>
        <table:table-row>
          <table:table-cell table:style-name="Tableau1.A6" office:value-type="string">
            <text:p text:style-name="P66">5</text:p>
          </table:table-cell>
          <table:table-cell table:style-name="Tableau1.A6" office:value-type="string">
            <text:p text:style-name="P67">Ajout vacance</text:p>
          </table:table-cell>
          <table:table-cell table:style-name="Tableau1.A6" office:value-type="string">
            <text:p text:style-name="P68">les familles et les intervenants pourront ajouter leur date de vacances </text:p>
          </table:table-cell>
          <table:table-cell table:style-name="Tableau1.A6" office:value-type="string">
            <text:p text:style-name="P66">Ajout fonctionnalités PHP</text:p>
          </table:table-cell>
          <table:table-cell table:style-name="Tableau1.A6" office:value-type="string">
            <text:p text:style-name="P66">En attente</text:p>
          </table:table-cell>
        </table:table-row>
        <table:table-row>
          <table:table-cell table:style-name="Tableau1.A6" office:value-type="string">
            <text:p text:style-name="P69">5</text:p>
          </table:table-cell>
          <table:table-cell table:style-name="Tableau1.A6" office:value-type="string">
            <text:p text:style-name="P70">Envoie Mail</text:p>
          </table:table-cell>
          <table:table-cell table:style-name="Tableau1.A6" office:value-type="string">
            <text:p text:style-name="P71"><text:span text:style-name="T35">E</text:span>nvoi automatique de mail de rappel de validation</text:p>
            <text:list text:style-name="L4">
              <text:list-item>
                <text:p text:style-name="P72"><text:soft-page-break/><text:span text:style-name="T36">P</text:span>our les familles Garde d’enfants, envoyer un email pour rappeler a la famille de valider les horaires saisis par les intervenants tous les weekends et à la fin du mois</text:p>
              </text:list-item>
              <text:list-item>
                <text:p text:style-name="P72"><text:span text:style-name="T37">P</text:span>our les familles Ménage, envoyer un email pour rappeler à la famille de valider les horaires saisis par les intervenants à la fin du mois.</text:p>
              </text:list-item>
            </text:list>
          </table:table-cell>
          <table:table-cell table:style-name="Tableau1.A6" office:value-type="string">
            <text:p text:style-name="P69">Utiliser l’implémentation <text:soft-page-break/>déjà encours avec send-mail</text:p>
          </table:table-cell>
          <table:table-cell table:style-name="Tableau1.A6" office:value-type="string">
            <text:p text:style-name="P66">En attente</text:p>
          </table:table-cell>
        </table:table-row>
        <table:table-row table:style-name="Tableau1.11">
          <table:table-cell table:style-name="Tableau1.A6" office:value-type="string">
            <text:p text:style-name="P73">3</text:p>
          </table:table-cell>
          <table:table-cell table:style-name="Tableau1.A6" office:value-type="string">
            <text:p text:style-name="P74">Modifier les tarifications </text:p>
          </table:table-cell>
          <table:table-cell table:style-name="Tableau1.A6" office:value-type="string">
            <text:p text:style-name="P75">L’administrateur doit pouvoir modifier les tarifications</text:p>
          </table:table-cell>
          <table:table-cell table:style-name="Tableau1.D11">
            <text:p text:style-name="P76"/>
          </table:table-cell>
          <table:table-cell table:style-name="Tableau1.A6" office:value-type="string">
            <text:p text:style-name="P73">En attente</text:p>
          </table:table-cell>
        </table:table-row>
        <table:table-row table:style-name="Tableau1.12">
          <table:table-cell table:style-name="Tableau1.A12" office:value-type="string">
            <text:p text:style-name="P76"/>
            <text:p text:style-name="P76">5</text:p>
          </table:table-cell>
          <table:table-cell table:style-name="Tableau1.B12" office:value-type="string">
            <text:p text:style-name="P58"><text:s/><text:span text:style-name="T30">Ajout de test unitaire</text:span></text:p>
          </table:table-cell>
          <table:table-cell table:style-name="Tableau1.C12" office:value-type="string">
            <text:p text:style-name="P77">Permet de vérifier rapidement le fonctionnement des fonctionnalités de l’application principal</text:p>
          </table:table-cell>
          <table:table-cell table:style-name="Tableau1.D12" office:value-type="string">
            <text:p text:style-name="P76">Utiliser PHPUnit pour les tests</text:p>
          </table:table-cell>
          <table:table-cell table:style-name="Tableau1.E12" office:value-type="string">
            <text:p text:style-name="P78">En attente</text:p>
          </table:table-cell>
        </table:table-row>
        <table:table-row table:style-name="Tableau1.13">
          <table:table-cell table:style-name="Tableau1.A13" office:value-type="string">
            <text:p text:style-name="P76"/>
          </table:table-cell>
          <table:table-cell table:style-name="Tableau1.B13">
            <text:p text:style-name="P58"/>
          </table:table-cell>
          <table:table-cell table:style-name="Tableau1.B13">
            <text:p text:style-name="P77"/>
          </table:table-cell>
          <table:table-cell table:style-name="Tableau1.B13">
            <text:p text:style-name="P76"/>
          </table:table-cell>
          <table:table-cell table:style-name="Tableau1.B13">
            <text:p text:style-name="P78"/>
          </table:table-cell>
        </table:table-row>
        <table:table-row table:style-name="Tableau1.13">
          <table:table-cell table:style-name="Tableau1.A13" office:value-type="string">
            <text:p text:style-name="P76"/>
          </table:table-cell>
          <table:table-cell table:style-name="Tableau1.B13">
            <text:p text:style-name="P58"/>
          </table:table-cell>
          <table:table-cell table:style-name="Tableau1.B13">
            <text:p text:style-name="P77"/>
          </table:table-cell>
          <table:table-cell table:style-name="Tableau1.B13">
            <text:p text:style-name="P76"/>
          </table:table-cell>
          <table:table-cell table:style-name="Tableau1.B13">
            <text:p text:style-name="P78"/>
          </table:table-cell>
        </table:table-row>
        <table:table-row table:style-name="Tableau1.13">
          <table:table-cell table:style-name="Tableau1.A13" office:value-type="string">
            <text:p text:style-name="P76"/>
          </table:table-cell>
          <table:table-cell table:style-name="Tableau1.B13">
            <text:p text:style-name="P58"/>
          </table:table-cell>
          <table:table-cell table:style-name="Tableau1.B13">
            <text:p text:style-name="P77"/>
          </table:table-cell>
          <table:table-cell table:style-name="Tableau1.B13">
            <text:p text:style-name="P76"/>
          </table:table-cell>
          <table:table-cell table:style-name="Tableau1.B13">
            <text:p text:style-name="P78"/>
          </table:table-cell>
        </table:table-row>
        <table:table-row table:style-name="Tableau1.13">
          <table:table-cell table:style-name="Tableau1.A13" office:value-type="string">
            <text:p text:style-name="P76"/>
          </table:table-cell>
          <table:table-cell table:style-name="Tableau1.B13">
            <text:p text:style-name="P58"/>
          </table:table-cell>
          <table:table-cell table:style-name="Tableau1.B13">
            <text:p text:style-name="P77"/>
          </table:table-cell>
          <table:table-cell table:style-name="Tableau1.B13">
            <text:p text:style-name="P76"/>
          </table:table-cell>
          <table:table-cell table:style-name="Tableau1.B13">
            <text:p text:style-name="P78"/>
          </table:table-cell>
        </table:table-row>
        <table:table-row table:style-name="Tableau1.13">
          <table:table-cell table:style-name="Tableau1.A13" office:value-type="string">
            <text:p text:style-name="P76"/>
          </table:table-cell>
          <table:table-cell table:style-name="Tableau1.B13">
            <text:p text:style-name="P58"/>
          </table:table-cell>
          <table:table-cell table:style-name="Tableau1.B13">
            <text:p text:style-name="P77"/>
          </table:table-cell>
          <table:table-cell table:style-name="Tableau1.B13">
            <text:p text:style-name="P76"/>
          </table:table-cell>
          <table:table-cell table:style-name="Tableau1.B13">
            <text:p text:style-name="P78"/>
          </table:table-cell>
        </table:table-row>
        <table:table-row table:style-name="Tableau1.13">
          <table:table-cell table:style-name="Tableau1.A18" office:value-type="string">
            <text:p text:style-name="P76"/>
          </table:table-cell>
          <table:table-cell table:style-name="Tableau1.B18">
            <text:p text:style-name="P58"/>
          </table:table-cell>
          <table:table-cell table:style-name="Tableau1.B18">
            <text:p text:style-name="P77"/>
          </table:table-cell>
          <table:table-cell table:style-name="Tableau1.B18">
            <text:p text:style-name="P76"/>
          </table:table-cell>
          <table:table-cell table:style-name="Tableau1.B18">
            <text:p text:style-name="P78"/>
          </table:table-cell>
        </table:table-row>
      </table:table>
      <text:p text:style-name="P79"/>
      <text:p text:style-name="P80">Pas à jours</text:p>
      <text:h text:style-name="P81" text:outline-level="1"><text:bookmark-start text:name="__RefHeading___Toc1057_2308554119 Copie 1"/>Documentation CODE<text:bookmark-end text:name="__RefHeading___Toc1057_2308554119 Copie 1"/></text:h>
      <text:h text:style-name="Heading_20_2" text:outline-level="2"><text:bookmark-start text:name="__RefHeading___Toc25436_3350031955"/>Contexte<text:bookmark-end text:name="__RefHeading___Toc25436_3350031955"/></text:h>
      <text:p text:style-name="P82">Diagramme qui montre tout le contexte</text:p>
      <text:h text:style-name="P83" text:outline-level="2"><text:bookmark-start text:name="__RefHeading___Toc26977_3350031955"/>Service<text:bookmark-end text:name="__RefHeading___Toc26977_3350031955"/></text:h>
      <text:h text:style-name="P84" text:outline-level="3"><text:bookmark-start text:name="__RefHeading___Toc40588_3350031955"/>Description<text:bookmark-end text:name="__RefHeading___Toc40588_3350031955"/></text:h>
      <text:p text:style-name="P85">Feuille Heures Service</text:p>
      <text:p text:style-name="P85"><text:span text:style-name="T38">E</text:span>st une classe qui permet de concevoir l’objet pour les relever d’heures</text:p>
      <text:p text:style-name="P86">Il y a une méthode static getMoisByIndex() qui permet de transformer la forme numérique d’un mois.</text:p>
      <text:p text:style-name="P87">Cette méthode est utilisée à plusieurs endroits dans le code.</text:p>
      <text:p text:style-name="P86">Exemple getMoisByIndex(4) → Avril</text:p>
      <text:p text:style-name="P86"/>
      <text:h text:style-name="P83" text:outline-level="2"><draw:frame draw:style-name="fr1" draw:name="Image3" text:anchor-type="char" svg:x="0.189cm" svg:y="0.049cm" svg:width="9.234cm" svg:height="8.89cm" draw:z-index="2"><draw:image xlink:href="Pictures/10011A2D00002412000022BA04B81E6F.svg" xlink:type="simple" xlink:show="embed" xlink:actuate="onLoad" draw:mime-type="image/svg+xml"/><draw:image xlink:href="Pictures/100000010000015D00000150AC277B2C.png" xlink:type="simple" xlink:show="embed" xlink:actuate="onLoad" draw:mime-type="image/png"/></draw:frame></text:h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8" text:outline-level="2"/>
      <text:h text:style-name="P89" text:outline-level="2"><text:bookmark-start text:name="__RefHeading___Toc26979_3350031955"/>Controller<text:bookmark-end text:name="__RefHeading___Toc26979_3350031955"/></text:h>
      <text:h text:style-name="P90" text:outline-level="3"><text:bookmark-start text:name="__RefHeading___Toc40590_3350031955"/>Description<text:bookmark-end text:name="__RefHeading___Toc40590_3350031955"/></text:h>
      <text:p text:style-name="P91">Diagrammes <text:span text:style-name="T39">qui montrent tous les controllers. </text:span></text:p>
      <text:h text:style-name="P92" text:outline-level="3"><text:bookmark-start text:name="__RefHeading___Toc30908_3350031955 Copie 1 Copie 1"/>Diagramme de classe<text:line-break/><draw:frame draw:style-name="fr1" draw:name="Image1" text:anchor-type="char" svg:x="0.189cm" svg:y="1.401cm" svg:width="17cm" svg:height="10.458cm" draw:z-index="0"><draw:image xlink:href="Pictures/1001A892000059B60000373112478B28.svg" xlink:type="simple" xlink:show="embed" xlink:actuate="onLoad" draw:mime-type="image/svg+xml"/><draw:image xlink:href="Pictures/100000010000036400000216F714E550.png" xlink:type="simple" xlink:show="embed" xlink:actuate="onLoad" draw:mime-type="image/png"/></draw:frame><text:bookmark-end text:name="__RefHeading___Toc30908_3350031955 Copie 1 Copie 1"/></text:h>
      <text:h text:style-name="P93" text:outline-level="2"/>
      <text:h text:style-name="P94" text:outline-level="2"><text:bookmark-start text:name="__RefHeading___Toc26981_3350031955"/>Security<text:bookmark-end text:name="__RefHeading___Toc26981_3350031955"/></text:h>
      <text:h text:style-name="P95" text:outline-level="3"><text:bookmark-start text:name="__RefHeading___Toc30906_3350031955 Copie 1"/><text:span text:style-name="T40">D</text:span>escription<text:bookmark-end text:name="__RefHeading___Toc30906_3350031955 Copie 1"/></text:h>
      <text:p text:style-name="P96">Auth est une interface qui permet de récupérer les informations. À partir des variables de sessions</text:p>
      <text:p text:style-name="P97"/>
      <text:h text:style-name="P95" text:outline-level="3"><text:bookmark-start text:name="__RefHeading___Toc30908_3350031955 Copie 1"/>Diagramme de classe<text:bookmark-end text:name="__RefHeading___Toc30908_3350031955 Copie 1"/></text:h>
      <text:p text:style-name="Text_20_body"><draw:frame draw:style-name="fr1" draw:name="Image4" text:anchor-type="char" svg:x="-0.041cm" svg:y="0.134cm" svg:width="6.191cm" svg:height="10.769cm" draw:z-index="3"><draw:image xlink:href="Pictures/1000B7C60000182F00002A11D2E1E439.svg" xlink:type="simple" xlink:show="embed" xlink:actuate="onLoad" draw:mime-type="image/svg+xml"/><draw:image xlink:href="Pictures/10000001000000EA00000197F4B797C5.png" xlink:type="simple" xlink:show="embed" xlink:actuate="onLoad" draw:mime-type="image/png"/></draw:frame><text:s/><text:span text:style-name="T41">i</text:span><text:span text:style-name="T42">sAdmin() → Continent une variable magique pour reconnaître l’administrateur. Il serait pertinent à l’avenir de trouver une solution plus propre</text:span></text:p>
      <text:p text:style-name="Text_20_body"/>
      <text:h text:style-name="P98" text:outline-level="3" text:is-list-header="true"/>
      <text:h text:style-name="P99" text:outline-level="2"><text:bookmark-start text:name="__RefHeading___Toc26983_3350031955"/>PdoApp<text:bookmark-end text:name="__RefHeading___Toc26983_3350031955"/></text:h>
      <text:h text:style-name="Heading_20_3" text:outline-level="3"><text:bookmark-start text:name="__RefHeading___Toc30906_3350031955"/><text:span text:style-name="T40">D</text:span>escription<text:bookmark-end text:name="__RefHeading___Toc30906_3350031955"/></text:h>
      <text:p text:style-name="P100">PdoApp est la classe qui contient toutes les requêtes SQL, qui sert à communiquer avec la base de données.</text:p>
      <text:p text:style-name="P100">À l’avenir, il serait pertinent de le passer sous <text:span text:style-name="T43">Doctrine.</text:span></text:p>
      <text:p text:style-name="P101"/>
      <text:h text:style-name="Heading_20_3" text:outline-level="3"><text:bookmark-start text:name="__RefHeading___Toc30908_3350031955"/>Diagramme de classe<text:bookmark-end text:name="__RefHeading___Toc30908_3350031955"/></text:h>
      <text:p text:style-name="Text_20_body"><draw:frame draw:style-name="fr2" draw:name="Image2" text:anchor-type="char" svg:x="-0.416cm" svg:y="0.002cm" svg:width="7.99cm" svg:height="18.861cm" draw:z-index="1"><draw:image xlink:href="Pictures/1001BE89000024E6000070A85212039B.svg" xlink:type="simple" xlink:show="embed" xlink:actuate="onLoad" draw:mime-type="image/svg+xml"/><draw:image xlink:href="Pictures/10000001000001650000044212BC3BBE.png" xlink:type="simple" xlink:show="embed" xlink:actuate="onLoad" draw:mime-type="image/png"/></draw:frame></text:p>
      <text:h text:style-name="P102" text:outline-level="1" text:is-list-header="true"><text:bookmark-start text:name="__RefHeading___Toc1057_2308554119 Copie 1 Copie 1"/>Documentation <text:span text:style-name="T44">API</text:span><text:bookmark-end text:name="__RefHeading___Toc1057_2308554119 Copie 1 Copie 1"/></text:h>
      <text:h text:style-name="Heading_20_2" text:outline-level="2"><text:bookmark-start text:name="__RefHeading___Toc673_3350031955"/>Contexte<text:bookmark-end text:name="__RefHeading___Toc673_3350031955"/></text:h>
      <text:p text:style-name="P103">Historiquement le service fonctionnait sans API. L’application génère tous les pages dynamiquement par rapport à la base de données</text:p>
      <text:p text:style-name="P103"/>
      <text:p text:style-name="P103">Le choix de la passer à une API permet de séparer complètement le FRONT et le BACK.</text:p>
      <text:p text:style-name="P104">Ce qui apportent plusieurs avantages :</text:p>
      <text:list text:style-name="L5">
        <text:list-item>
          <text:p text:style-name="P105">Intégration (Ajout de web app ou interconnexion entre les services)</text:p>
        </text:list-item>
        <text:list-item>
          <text:p text:style-name="P105">Refonte UI plus rapide, on se soucie moins de comment le backend est fait</text:p>
        </text:list-item>
        <text:list-item>
          <text:p text:style-name="P105">Travail d’équipe plus efficace, on peut préparer <text:span text:style-name="T45">le front sans ce soucier du back</text:span></text:p>
        </text:list-item>
      </text:list>
      <text:p text:style-name="P106">Inconvénient :</text:p>
      <text:list text:style-name="L6">
        <text:list-item>
          <text:p text:style-name="P107">Plus dure à mettre en place</text:p>
        </text:list-item>
        <text:list-item>
          <text:p text:style-name="P108">Si mauvaise communication perd en efficacité.</text:p>
        </text:list-item>
      </text:list>
      <text:p text:style-name="P109"/>
      <text:h text:style-name="P93" text:outline-level="2"/>
      <text:h text:style-name="P94" text:outline-level="2"><text:bookmark-start text:name="__RefHeading___Toc5243_3350031955"/>Intervenant<text:bookmark-end text:name="__RefHeading___Toc5243_3350031955"/></text:h>
      <text:h text:style-name="Heading_20_3" text:outline-level="3"><text:bookmark-start text:name="__RefHeading___Toc5245_3350031955"/>api_ajout_horaire<text:bookmark-end text:name="__RefHeading___Toc5245_3350031955"/></text:h>
      <text:p text:style-name="Text_20_body"/>
      <text:p text:style-name="P110"><text:span text:style-name="T46">Methode</text:span> : POST</text:p>
      <text:p text:style-name="P111"><text:span text:style-name="T46">URL</text:span> : /api/intervenants/horaire/ajouter/<text:span text:style-name="T47">{id}<text:line-break/><text:tab/></text:span><text:span text:style-name="T48">{id}</text:span><text:span text:style-name="T47"> : </text:span><text:span text:style-name="T49">de l’intervenant</text:span></text:p>
      <text:p text:style-name="P112"><text:span text:style-name="T46">HTTP_CODE</text:span> : 200, <text:span text:style-name="T50">401</text:span></text:p>
      <text:p text:style-name="P113"/>
      <text:p text:style-name="P114"><text:span text:style-name="T46">Description </text:span>: Permet d’ajouter <text:span text:style-name="T51">une </text:span><text:span text:style-name="T52">horaire d’intervention à un intervenant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15">POST</text:p>
          </table:table-cell>
        </table:table-row>
        <table:table-row>
          <table:table-cell table:style-name="Tableau4.A2" office:value-type="string">
            <text:p text:style-name="P116">[{</text:p>
            <text:p text:style-name="P117"><text:span text:style-name="T53"><text:tab/></text:span><text:span text:style-name="T54">"famille"</text:span><text:span text:style-name="T53"> : </text:span><text:span text:style-name="T55">"MZ008"</text:span><text:span text:style-name="T53">, </text:span><text:span text:style-name="T56">// ID de la famille</text:span></text:p>
            <text:p text:style-name="P117"><text:span text:style-name="T53"><text:tab/></text:span><text:span text:style-name="T54">"nomRemplacement"</text:span><text:span text:style-name="T53">: </text:span><text:span text:style-name="T55">""</text:span><text:span text:style-name="T53">, <text:s/></text:span><text:span text:style-name="T56">// Nom de la famille ou famille inconnue</text:span></text:p>
            <text:p text:style-name="P117"><text:span text:style-name="T53"><text:s text:c="2"/><text:tab/></text:span><text:span text:style-name="T54">"type"</text:span><text:span text:style-name="T53">: </text:span><text:span text:style-name="T55">"MENA"</text:span><text:span text:style-name="T53">, </text:span><text:span text:style-name="T56">// Prend deux valeur ENFA/MENA</text:span></text:p>
            <text:p text:style-name="P117"><text:span text:style-name="T53"><text:s text:c="2"/><text:tab/></text:span><text:span text:style-name="T54">"date"</text:span><text:span text:style-name="T53"> : <text:s/></text:span><text:span text:style-name="T55">"2026-04-02"</text:span><text:span text:style-name="T53"> ,</text:span></text:p>
            <text:p text:style-name="P117"><text:span text:style-name="T53"><text:s text:c="2"/><text:tab/></text:span><text:span text:style-name="T54">"heureDebut"</text:span><text:span text:style-name="T53"> : </text:span><text:span text:style-name="T55">12</text:span><text:span text:style-name="T53">,</text:span></text:p>
            <text:p text:style-name="P117"><text:span text:style-name="T53"><text:s text:c="2"/><text:tab/></text:span><text:span text:style-name="T54">"minuteDebut"</text:span><text:span text:style-name="T53"> : </text:span><text:span text:style-name="T55">50</text:span><text:span text:style-name="T53">,</text:span></text:p>
            <text:p text:style-name="P117"><text:span text:style-name="T53"><text:s text:c="2"/><text:tab/></text:span><text:span text:style-name="T54">"heureFin"</text:span><text:span text:style-name="T53"> : </text:span><text:span text:style-name="T55">16</text:span><text:span text:style-name="T53">,</text:span></text:p>
            <text:p text:style-name="P117"><text:span text:style-name="T53"><text:s text:c="2"/><text:tab/></text:span><text:span text:style-name="T54">"minuteFin"</text:span><text:span text:style-name="T53"> : </text:span><text:span text:style-name="T55">50</text:span><text:span text:style-name="T53">, </text:span></text:p>
            <text:p text:style-name="P117"><text:span text:style-name="T53"><text:s text:c="2"/><text:tab/></text:span><text:span text:style-name="T54">"trajet"</text:span><text:span text:style-name="T53"> : </text:span><text:span text:style-name="T55">5</text:span><text:span text:style-name="T53"> </text:span><text:span text:style-name="T56">// Distance parcourue avec enfant</text:span></text:p>
            <text:p text:style-name="P116">}]</text:p>
          </table:table-cell>
        </table:table-row>
      </table:table>
      <text:p text:style-name="P1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8">HTTP CODE</text:p>
          </table:table-cell>
          <table:table-cell table:style-name="Tableau3.B1" office:value-type="string">
            <text:p text:style-name="P118">Retour API</text:p>
          </table:table-cell>
        </table:table-row>
        <table:table-row>
          <table:table-cell table:style-name="Tableau3.A2" office:value-type="string">
            <text:p text:style-name="P119">401</text:p>
          </table:table-cell>
          <table:table-cell table:style-name="Tableau3.B2" office:value-type="string">
            <text:p text:style-name="P120">[{<text:span text:style-name="T57"/></text:p>
            <text:p text:style-name="P121"><text:span text:style-name="T53"><text:tab/></text:span><text:span text:style-name="T54">"success"</text:span><text:span text:style-name="T53"> : </text:span><text:span text:style-name="T55">false</text:span><text:span text:style-name="T53">,</text:span></text:p>
            <text:p text:style-name="P121"><text:span text:style-name="T53"><text:tab/></text:span><text:span text:style-name="T54">"message"</text:span><text:span text:style-name="T53">: </text:span><text:span text:style-name="T55">"Info erreur"</text:span></text:p>
            <text:p text:style-name="P120">}]</text:p>
          </table:table-cell>
        </table:table-row>
        <table:table-row>
          <table:table-cell table:style-name="Tableau3.A3" office:value-type="string">
            <text:p text:style-name="P122">200</text:p>
          </table:table-cell>
          <table:table-cell table:style-name="Tableau3.B3" office:value-type="string">
            <text:p text:style-name="P123">[{</text:p>
            <text:p text:style-name="P124"><text:span text:style-name="T53"><text:tab/></text:span><text:span text:style-name="T54">"success"</text:span><text:span text:style-name="T53"> : </text:span><text:span text:style-name="T58">true</text:span><text:span text:style-name="T53">,</text:span></text:p>
            <text:p text:style-name="P124"><text:span text:style-name="T53"><text:tab/></text:span><text:span text:style-name="T54">"message"</text:span><text:span text:style-name="T53">: </text:span><text:span text:style-name="T55">"Info </text:span><text:span text:style-name="T59">reussite</text:span><text:span text:style-name="T55">"</text:span></text:p>
            <text:p text:style-name="P123">}]</text:p>
          </table:table-cell>
        </table:table-row>
      </table:table>
      <text:p text:style-name="P112"/>
      <text:h text:style-name="P125" text:outline-level="3"/>
      <text:h text:style-name="P126" text:outline-level="3"><text:bookmark-start text:name="__RefHeading___Toc13412_3350031955"/>api_modifie_horaire<text:bookmark-end text:name="__RefHeading___Toc13412_3350031955"/></text:h>
      <text:p text:style-name="P127"/>
      <text:p text:style-name="P128"><text:span text:style-name="T46">Methode</text:span> : POST</text:p>
      <text:p text:style-name="P128"><text:span text:style-name="T46">URL</text:span> : /api/intervenants/horaire/modifier/<text:span text:style-name="T47">{id}<text:line-break/><text:tab/></text:span><text:span text:style-name="T48">{id}</text:span><text:span text:style-name="T47"> : </text:span><text:span text:style-name="T49">de l’intervenant</text:span></text:p>
      <text:p text:style-name="P129"><text:span text:style-name="T46">HTTP_CODE</text:span> : 200, <text:span text:style-name="T50">401</text:span></text:p>
      <text:p text:style-name="P129"/>
      <text:p text:style-name="P130"><text:span text:style-name="T46">Description </text:span>: Permet <text:span text:style-name="T60">de modifier</text:span> <text:span text:style-name="T51">une </text:span><text:span text:style-name="T52">horaire d’intervention à </text:span><text:span text:style-name="T60">d’</text:span><text:span text:style-name="T52">un intervenant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31">POST</text:p>
          </table:table-cell>
        </table:table-row>
        <table:table-row>
          <table:table-cell table:style-name="Tableau5.A2" office:value-type="string">
            <text:p text:style-name="P132">[{<text:span text:style-name="T57"/></text:p>
            <text:p text:style-name="P133"><text:span text:style-name="T53"><text:tab/></text:span><text:span text:style-name="T54">"id"</text:span><text:span text:style-name="T53"> : </text:span><text:span text:style-name="T55">27</text:span><text:span text:style-name="T53">,</text:span></text:p>
            <text:p text:style-name="P133"><text:span text:style-name="T53"><text:tab/></text:span><text:span text:style-name="T54">"famille"</text:span><text:span text:style-name="T53"> : </text:span><text:span text:style-name="T55">"MZ008"</text:span><text:span text:style-name="T53">, </text:span><text:span text:style-name="T56">// ID de la famille</text:span></text:p>
            <text:p text:style-name="P133"><text:span text:style-name="T53"><text:tab/></text:span><text:span text:style-name="T54">"nomRemplacement"</text:span><text:span text:style-name="T53">: </text:span><text:span text:style-name="T55">""</text:span><text:span text:style-name="T53">, <text:s/></text:span><text:span text:style-name="T56">// Nom de la famille ou famille inconnue</text:span></text:p>
            <text:p text:style-name="P133"><text:span text:style-name="T53"><text:s text:c="2"/><text:tab/></text:span><text:span text:style-name="T54">"type"</text:span><text:span text:style-name="T53">: </text:span><text:span text:style-name="T55">"MENA"</text:span><text:span text:style-name="T53">, </text:span><text:span text:style-name="T56">// Prend deux valeur ENFA/MENA</text:span></text:p>
            <text:p text:style-name="P133"><text:span text:style-name="T53"><text:s text:c="2"/><text:tab/></text:span><text:span text:style-name="T54">"date"</text:span><text:span text:style-name="T53"> : <text:s/></text:span><text:span text:style-name="T55">"2026-04-02"</text:span><text:span text:style-name="T53"> ,</text:span></text:p>
            <text:p text:style-name="P133"><text:span text:style-name="T53"><text:tab/> </text:span><text:span text:style-name="T54">"heureDebut"</text:span><text:span text:style-name="T53"> : </text:span><text:span text:style-name="T55">12</text:span><text:span text:style-name="T53">,</text:span></text:p>
            <text:p text:style-name="P133"><text:span text:style-name="T53"><text:s text:c="2"/><text:tab/></text:span><text:span text:style-name="T54">"minuteDebut"</text:span><text:span text:style-name="T53"> : </text:span><text:span text:style-name="T55">50</text:span><text:span text:style-name="T53">,</text:span></text:p>
            <text:p text:style-name="P133"><text:span text:style-name="T53"><text:s text:c="2"/><text:tab/></text:span><text:span text:style-name="T54">"heureFin"</text:span><text:span text:style-name="T53"> : </text:span><text:span text:style-name="T55">16</text:span><text:span text:style-name="T53">,</text:span></text:p>
            <text:p text:style-name="P133"><text:span text:style-name="T53"><text:s/><text:tab/></text:span><text:span text:style-name="T54">"minuteFin"</text:span><text:span text:style-name="T53"> : </text:span><text:span text:style-name="T55">50</text:span><text:span text:style-name="T53">, </text:span></text:p>
            <text:p text:style-name="P133"><text:span text:style-name="T53"><text:s text:c="2"/><text:tab/></text:span><text:span text:style-name="T54">"trajet"</text:span><text:span text:style-name="T53"> : </text:span><text:span text:style-name="T55">5</text:span><text:span text:style-name="T53"> </text:span><text:span text:style-name="T56">// Distance parcourue avec enfant</text:span></text:p>
            <text:p text:style-name="P132">}]</text:p>
          </table:table-cell>
        </table:table-row>
      </table:table>
      <text:p text:style-name="P129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34">HTTP CODE</text:p>
          </table:table-cell>
          <table:table-cell table:style-name="Tableau6.B1" office:value-type="string">
            <text:p text:style-name="P134">Retour API</text:p>
          </table:table-cell>
        </table:table-row>
        <table:table-row>
          <table:table-cell table:style-name="Tableau6.A2" office:value-type="string">
            <text:p text:style-name="P135">401</text:p>
          </table:table-cell>
          <table:table-cell table:style-name="Tableau6.B2" office:value-type="string">
            <text:p text:style-name="P132">[{</text:p>
            <text:p text:style-name="P133"><text:span text:style-name="T53"><text:tab/></text:span><text:span text:style-name="T54">"success"</text:span><text:span text:style-name="T53"> : </text:span><text:span text:style-name="T55">false</text:span><text:span text:style-name="T53">,</text:span></text:p>
            <text:p text:style-name="P133"><text:span text:style-name="T53"><text:tab/></text:span><text:span text:style-name="T54">"message"</text:span><text:span text:style-name="T53">: </text:span><text:span text:style-name="T55">"Info erreur"</text:span></text:p>
            <text:p text:style-name="P132">}]</text:p>
          </table:table-cell>
        </table:table-row>
        <table:table-row table:style-name="Tableau6.3">
          <table:table-cell table:style-name="Tableau6.A3" office:value-type="string">
            <text:p text:style-name="P136">200</text:p>
          </table:table-cell>
          <table:table-cell table:style-name="Tableau6.B3" office:value-type="string">
            <text:p text:style-name="P132">[{</text:p>
            <text:p text:style-name="P133"><text:span text:style-name="T53"><text:tab/></text:span><text:span text:style-name="T54">"success"</text:span><text:span text:style-name="T53"> : </text:span><text:span text:style-name="T58">true</text:span><text:span text:style-name="T53">,</text:span></text:p>
            <text:p text:style-name="P133"><text:span text:style-name="T53"><text:tab/></text:span><text:span text:style-name="T54">"message"</text:span><text:span text:style-name="T53">: </text:span><text:span text:style-name="T55">"Info </text:span><text:span text:style-name="T59">reussite</text:span><text:span text:style-name="T55">"</text:span></text:p>
            <text:p text:style-name="P132">}]</text:p>
          </table:table-cell>
        </table:table-row>
      </table:table>
      <text:p text:style-name="P129"/>
      <text:h text:style-name="P137" text:outline-level="3"/>
      <text:h text:style-name="P138" text:outline-level="3"><text:bookmark-start text:name="__RefHeading___Toc13412_3350031955 Copie 1"/>api_get_modifier_horaire<text:bookmark-end text:name="__RefHeading___Toc13412_3350031955 Copie 1"/></text:h>
      <text:p text:style-name="P139"/>
      <text:p text:style-name="P140"><text:span text:style-name="T46">Methode</text:span> : <text:span text:style-name="T61">GET</text:span></text:p>
      <text:p text:style-name="P140"><text:span text:style-name="T46">URL</text:span> : /api/intervenants/horaire/<text:span text:style-name="T47">{id}<text:line-break/><text:tab/></text:span><text:span text:style-name="T48">{id}</text:span><text:span text:style-name="T47"> : </text:span><text:span text:style-name="T49">de l’intervenant</text:span></text:p>
      <text:p text:style-name="P141"><text:span text:style-name="T46">HTTP_CODE</text:span> : 200, <text:span text:style-name="T50">401</text:span></text:p>
      <text:p text:style-name="P141"/>
      <text:p text:style-name="P142"><text:span text:style-name="T46">Description </text:span>: <text:span text:style-name="T62">Obtient les infos d’une intervention</text:span>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43">HTTP CODE</text:p>
          </table:table-cell>
          <table:table-cell table:style-name="Tableau8.B1" office:value-type="string">
            <text:p text:style-name="P143">Retour API</text:p>
          </table:table-cell>
        </table:table-row>
        <table:table-row>
          <table:table-cell table:style-name="Tableau8.A2" office:value-type="string">
            <text:p text:style-name="P144">401</text:p>
          </table:table-cell>
          <table:table-cell table:style-name="Tableau8.B2" office:value-type="string">
            <text:p text:style-name="P145">[{</text:p>
            <text:p text:style-name="P146"><text:span text:style-name="T53"><text:tab/></text:span><text:span text:style-name="T54">"success"</text:span><text:span text:style-name="T53"> : </text:span><text:span text:style-name="T55">false</text:span><text:span text:style-name="T53">,</text:span></text:p>
            <text:p text:style-name="P146"><text:span text:style-name="T53"><text:tab/></text:span><text:span text:style-name="T54">"message"</text:span><text:span text:style-name="T53">: </text:span><text:span text:style-name="T55">"Info erreur"</text:span></text:p>
            <text:p text:style-name="P145">}]</text:p>
          </table:table-cell>
        </table:table-row>
        <table:table-row>
          <table:table-cell table:style-name="Tableau8.A3" office:value-type="string">
            <text:p text:style-name="P147">200</text:p>
          </table:table-cell>
          <table:table-cell table:style-name="Tableau8.B3" office:value-type="string">
            <text:p text:style-name="P145">[{<text:span text:style-name="T57"/></text:p>
            <text:p text:style-name="P146"><text:span text:style-name="T53"><text:s text:c="2"/></text:span><text:span text:style-name="T54">"success"</text:span><text:span text:style-name="T53"> : </text:span><text:span text:style-name="T55">false</text:span><text:span text:style-name="T53">,</text:span></text:p>
            <text:p text:style-name="P146"><text:span text:style-name="T53"><text:s text:c="2"/></text:span><text:span text:style-name="T54">"data"</text:span><text:span text:style-name="T53"> : {</text:span></text:p>
            <text:p text:style-name="P146"><text:span text:style-name="T53"><text:s text:c="4"/></text:span><text:span text:style-name="T54">"id"</text:span><text:span text:style-name="T53">: </text:span><text:span text:style-name="T55">4</text:span><text:span text:style-name="T53">,</text:span></text:p>
            <text:p text:style-name="P146"><text:span text:style-name="T53"><text:s text:c="4"/></text:span><text:span text:style-name="T54">"numFam"</text:span><text:span text:style-name="T53">: </text:span><text:span text:style-name="T55">"9998"</text:span><text:span text:style-name="T53">,</text:span></text:p>
            <text:p text:style-name="P146"><text:span text:style-name="T53"><text:s text:c="4"/></text:span><text:span text:style-name="T54">"nomFam"</text:span><text:span text:style-name="T53">: </text:span><text:span text:style-name="T55">"FH"</text:span><text:span text:style-name="T53">,</text:span></text:p>
            <text:p text:style-name="P146"><text:span text:style-name="T53"><text:s text:c="4"/></text:span><text:span text:style-name="T54">"numInter"</text:span><text:span text:style-name="T53">: </text:span><text:span text:style-name="T55">412</text:span><text:span text:style-name="T53">,</text:span></text:p>
            <text:p text:style-name="P146"><text:span text:style-name="T53"><text:s text:c="4"/></text:span><text:span text:style-name="T54">"datePresta"</text:span><text:span text:style-name="T53">: </text:span><text:span text:style-name="T55">"2026-02-27"</text:span><text:span text:style-name="T53">,</text:span></text:p>
            <text:p text:style-name="P146"><text:span text:style-name="T53"><text:s text:c="4"/></text:span><text:span text:style-name="T54">"heureDebutPresta"</text:span><text:span text:style-name="T53">: </text:span><text:span text:style-name="T55">"00:00:00"</text:span><text:span text:style-name="T53">,</text:span></text:p>
            <text:p text:style-name="P146"><text:span text:style-name="T53"><text:s text:c="4"/></text:span><text:span text:style-name="T54">"heureFinPresta"</text:span><text:span text:style-name="T53">: </text:span><text:span text:style-name="T55">"04:00:00"</text:span><text:span text:style-name="T53">,</text:span></text:p>
            <text:p text:style-name="P146"><text:span text:style-name="T53"><text:s text:c="4"/></text:span><text:span text:style-name="T54">"typePresta"</text:span><text:span text:style-name="T53">: </text:span><text:span text:style-name="T55">"ENFA"</text:span><text:span text:style-name="T53">,</text:span></text:p>
            <text:p text:style-name="P146"><text:span text:style-name="T53"><text:s text:c="4"/></text:span><text:span text:style-name="T54">"kmAvecEnfant"</text:span><text:span text:style-name="T53">: </text:span><text:span text:style-name="T55">"5.0"</text:span><text:span text:style-name="T53">,</text:span></text:p>
            <text:p text:style-name="P146"><text:span text:style-name="T53"><text:s text:c="4"/></text:span><text:span text:style-name="T54">"ajouterLe"</text:span><text:span text:style-name="T53">: </text:span><text:span text:style-name="T55">"2026-02-27 10:08:44"</text:span><text:span text:style-name="T53">,</text:span></text:p>
            <text:p text:style-name="P146"><text:span text:style-name="T53"><text:s text:c="4"/></text:span><text:span text:style-name="T54">"modifierLe"</text:span><text:span text:style-name="T53">: </text:span><text:span text:style-name="T55">null</text:span><text:span text:style-name="T53">,</text:span></text:p>
            <text:p text:style-name="P146"><text:span text:style-name="T53"><text:s text:c="4"/></text:span><text:span text:style-name="T54">"desactiver"</text:span><text:span text:style-name="T53">: </text:span><text:span text:style-name="T55">0</text:span><text:span text:style-name="T53">,</text:span></text:p>
            <text:p text:style-name="P146"><text:span text:style-name="T53"><text:s text:c="4"/></text:span><text:span text:style-name="T54">"validerFam"</text:span><text:span text:style-name="T53">: </text:span><text:span text:style-name="T55">0</text:span><text:span text:style-name="T53">,</text:span></text:p>
            <text:p text:style-name="P146"><text:span text:style-name="T53"><text:s text:c="4"/></text:span><text:span text:style-name="T54">"validerLe"</text:span><text:span text:style-name="T53">: </text:span><text:span text:style-name="T55">null</text:span><text:span text:style-name="T53">,</text:span></text:p>
            <text:p text:style-name="P146"><text:span text:style-name="T53"><text:s text:c="4"/></text:span><text:span text:style-name="T54">"remarque"</text:span><text:span text:style-name="T53">: </text:span><text:span text:style-name="T55">null</text:span><text:span text:style-name="T53">,</text:span></text:p>
            <text:p text:style-name="P146"><text:span text:style-name="T53"><text:s text:c="4"/></text:span><text:span text:style-name="T54">"remarqueLe"</text:span><text:span text:style-name="T53">: </text:span><text:span text:style-name="T55">null</text:span><text:span text:style-name="T53"> </text:span></text:p>
            <text:p text:style-name="P146"><text:span text:style-name="T53"><text:s text:c="2"/>}</text:span><text:span text:style-name="T57"/></text:p>
            <text:p text:style-name="P145">}]</text:p>
          </table:table-cell>
        </table:table-row>
      </table:table>
      <text:p text:style-name="P141"/>
      <text:h text:style-name="P148" text:outline-level="3"><text:bookmark-start text:name="__RefHeading___Toc13412_3350031955 Copie 1 Copie 1"/>api_relever_fiche<text:bookmark-end text:name="__RefHeading___Toc13412_3350031955 Copie 1 Copie 1"/></text:h>
      <text:p text:style-name="P149"/>
      <text:p text:style-name="P150"><text:span text:style-name="T46">Methode</text:span> : <text:span text:style-name="T61">GET</text:span></text:p>
      <text:p text:style-name="P150"><text:span text:style-name="T46">URL</text:span> : /api/intervenants/releve/<text:span text:style-name="T47">{id}<text:line-break/><text:tab/></text:span><text:span text:style-name="T48">{id}</text:span><text:span text:style-name="T47"> : </text:span><text:span text:style-name="T49">de l’intervenant</text:span></text:p>
      <text:p text:style-name="P151"><text:soft-page-break/><text:span text:style-name="T46">HTTP_CODE</text:span> : 200, <text:span text:style-name="T50">401</text:span></text:p>
      <text:p text:style-name="P151"/>
      <text:p text:style-name="P152"><text:span text:style-name="T46">Description </text:span>: <text:span text:style-name="T63">Information relative à un relevé de fiche horaire</text:span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53">HTTP CODE</text:p>
          </table:table-cell>
          <table:table-cell table:style-name="Tableau7.B1" office:value-type="string">
            <text:p text:style-name="P153">Retour API</text:p>
          </table:table-cell>
        </table:table-row>
        <table:table-row>
          <table:table-cell table:style-name="Tableau7.A2" office:value-type="string">
            <text:p text:style-name="P154">401</text:p>
          </table:table-cell>
          <table:table-cell table:style-name="Tableau7.B2" office:value-type="string">
            <text:p text:style-name="P155">[{</text:p>
            <text:p text:style-name="P156"><text:span text:style-name="T53"><text:tab/></text:span><text:span text:style-name="T54">"success"</text:span><text:span text:style-name="T53"> : </text:span><text:span text:style-name="T55">false</text:span><text:span text:style-name="T53">,</text:span></text:p>
            <text:p text:style-name="P156"><text:span text:style-name="T53"><text:tab/></text:span><text:span text:style-name="T54">"message"</text:span><text:span text:style-name="T53">: </text:span><text:span text:style-name="T55">"Info erreur"</text:span></text:p>
            <text:p text:style-name="P155">}]</text:p>
          </table:table-cell>
        </table:table-row>
        <table:table-row>
          <table:table-cell table:style-name="Tableau7.A3" office:value-type="string">
            <text:p text:style-name="P157">200</text:p>
          </table:table-cell>
          <table:table-cell table:style-name="Tableau7.B3" office:value-type="string">
            <text:p text:style-name="P155">[{<text:span text:style-name="T57"/></text:p>
            <text:p text:style-name="P156"><text:span text:style-name="T53"><text:s text:c="2"/></text:span><text:span text:style-name="T54">"type"</text:span><text:span text:style-name="T53">: </text:span><text:span text:style-name="T55">"ENFA"</text:span><text:span text:style-name="T53">,</text:span></text:p>
            <text:p text:style-name="P156"><text:span text:style-name="T53"><text:s text:c="2"/></text:span><text:span text:style-name="T54">"periode"</text:span><text:span text:style-name="T53">: {</text:span></text:p>
            <text:p text:style-name="P156"><text:span text:style-name="T53"><text:s text:c="4"/></text:span><text:span text:style-name="T54">"debut"</text:span><text:span text:style-name="T53">: </text:span><text:span text:style-name="T55">"2026-02"</text:span><text:span text:style-name="T53">,</text:span></text:p>
            <text:p text:style-name="P156"><text:span text:style-name="T53"><text:s text:c="4"/></text:span><text:span text:style-name="T54">"fin"</text:span><text:span text:style-name="T53">: </text:span><text:span text:style-name="T55">"2026-02"</text:span><text:span text:style-name="T53">,</text:span></text:p>
            <text:p text:style-name="P156"><text:span text:style-name="T53"><text:s text:c="4"/></text:span><text:span text:style-name="T54">"anner"</text:span><text:span text:style-name="T53">: </text:span><text:span text:style-name="T55">"2026"</text:span><text:span text:style-name="T53">,</text:span></text:p>
            <text:p text:style-name="P156"><text:span text:style-name="T53"><text:s text:c="4"/></text:span><text:span text:style-name="T54">"mois"</text:span><text:span text:style-name="T53">: </text:span><text:span text:style-name="T55">"FÉVRIER"</text:span></text:p>
            <text:p text:style-name="P156"><text:span text:style-name="T53"><text:s text:c="2"/>},</text:span><text:span text:style-name="T57"/></text:p>
            <text:p text:style-name="P156"><text:span text:style-name="T53"><text:s text:c="2"/></text:span><text:span text:style-name="T54">"jours"</text:span><text:span text:style-name="T53">: [</text:span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01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dimanche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1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5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02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lun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2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6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03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mar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3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6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04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mercre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4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6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05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jeu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5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6</text:span></text:p>
            <text:p text:style-name="P156"><text:soft-page-break/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06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vendre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6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6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07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same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7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6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08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dimanche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8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6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09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lun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9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7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10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mar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10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7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11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mercre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11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7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12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jeu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12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7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13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vendre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13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7</text:span></text:p>
            <text:p text:style-name="P156"><text:span text:style-name="T53"><text:s text:c="4"/>},</text:span><text:span text:style-name="T57"/></text:p>
            <text:p text:style-name="P156"><text:soft-page-break/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14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same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14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7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15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dimanche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15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7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16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lun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16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8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17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mar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17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8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18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mercre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18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8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19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jeu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19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8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20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vendre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20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8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21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same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21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8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oft-page-break/><text:span text:style-name="T53"><text:s text:c="6"/></text:span><text:span text:style-name="T54">"date"</text:span><text:span text:style-name="T53">: </text:span><text:span text:style-name="T55">"2026-02-22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dimanche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22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8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23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lun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23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9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24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mar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24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9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25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mercre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25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9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26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jeu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26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9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27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vendre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27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9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date"</text:span><text:span text:style-name="T53">: </text:span><text:span text:style-name="T55">"2026-02-28"</text:span><text:span text:style-name="T53">,</text:span></text:p>
            <text:p text:style-name="P156"><text:span text:style-name="T53"><text:s text:c="6"/></text:span><text:span text:style-name="T54">"jour"</text:span><text:span text:style-name="T53">: </text:span><text:span text:style-name="T55">"samedi"</text:span><text:span text:style-name="T53">,</text:span></text:p>
            <text:p text:style-name="P156"><text:span text:style-name="T53"><text:s text:c="6"/></text:span><text:span text:style-name="T54">"numeroJour"</text:span><text:span text:style-name="T53">: </text:span><text:span text:style-name="T55">28</text:span><text:span text:style-name="T53">,</text:span></text:p>
            <text:p text:style-name="P156"><text:span text:style-name="T53"><text:s text:c="6"/></text:span><text:span text:style-name="T54">"semaine"</text:span><text:span text:style-name="T53">: </text:span><text:span text:style-name="T55">9</text:span></text:p>
            <text:p text:style-name="P156"><text:span text:style-name="T53"><text:s text:c="4"/>}</text:span><text:span text:style-name="T57"/></text:p>
            <text:p text:style-name="P156"><text:span text:style-name="T53"><text:s text:c="2"/>],</text:span><text:span text:style-name="T57"/></text:p>
            <text:p text:style-name="P156"><text:span text:style-name="T53"><text:s text:c="2"/></text:span><text:span text:style-name="T54">"intervenant"</text:span><text:span text:style-name="T53">: {</text:span></text:p>
            <text:p text:style-name="P156"><text:span text:style-name="T53"><text:s text:c="4"/></text:span><text:span text:style-name="T54">"id"</text:span><text:span text:style-name="T53">: </text:span><text:span text:style-name="T55">412</text:span><text:span text:style-name="T53">,</text:span></text:p>
            <text:p text:style-name="P156"><text:span text:style-name="T53"><text:s text:c="4"/></text:span><text:span text:style-name="T54">"id_intervenant"</text:span><text:span text:style-name="T53">: </text:span><text:span text:style-name="T55">412</text:span><text:span text:style-name="T53">,</text:span></text:p>
            <text:p text:style-name="P156"><text:span text:style-name="T53"><text:s text:c="4"/></text:span><text:span text:style-name="T54">"genre"</text:span><text:span text:style-name="T53">: </text:span><text:span text:style-name="T55">"MME"</text:span><text:span text:style-name="T53">,</text:span></text:p>
            <text:p text:style-name="P156"><text:span text:style-name="T53"><text:s text:c="4"/></text:span><text:span text:style-name="T54">"nom"</text:span><text:span text:style-name="T53">: </text:span><text:span text:style-name="T55">"POMMEREUL"</text:span><text:span text:style-name="T53">,</text:span></text:p>
            <text:p text:style-name="P156"><text:span text:style-name="T53"><text:s text:c="4"/></text:span><text:span text:style-name="T54">"prenom"</text:span><text:span text:style-name="T53">: </text:span><text:span text:style-name="T55">"Jessica"</text:span><text:span text:style-name="T53">,</text:span></text:p>
            <text:p text:style-name="P156"><text:span text:style-name="T53"><text:s text:c="4"/></text:span><text:span text:style-name="T54">"email"</text:span><text:span text:style-name="T53">: </text:span><text:span text:style-name="T55">"lempika35@hotmail.fr"</text:span><text:span text:style-name="T53">,</text:span></text:p>
            <text:p text:style-name="P156"><text:soft-page-break/><text:span text:style-name="T53"><text:s text:c="4"/></text:span><text:span text:style-name="T54">"Téléhone"</text:span><text:span text:style-name="T53">: </text:span><text:span text:style-name="T55">"06.60.20.67.02"</text:span><text:span text:style-name="T53">,</text:span></text:p>
            <text:p text:style-name="P156"><text:span text:style-name="T53"><text:s text:c="4"/></text:span><text:span text:style-name="T54">"ville de résidence"</text:span><text:span text:style-name="T53">: </text:span><text:span text:style-name="T55">"GEVEZE"</text:span><text:span text:style-name="T53">,</text:span></text:p>
            <text:p text:style-name="P156"><text:span text:style-name="T53"><text:s text:c="4"/></text:span><text:span text:style-name="T54">"adresse"</text:span><text:span text:style-name="T53">: </text:span><text:span text:style-name="T55">"11, avenue de la croix du Vivier apt 302"</text:span></text:p>
            <text:p text:style-name="P156"><text:span text:style-name="T53"><text:s text:c="2"/>},</text:span><text:span text:style-name="T57"/></text:p>
            <text:p text:style-name="P156"><text:span text:style-name="T53"><text:s text:c="2"/></text:span><text:span text:style-name="T54">"familles"</text:span><text:span text:style-name="T53">: [</text:span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nomFam"</text:span><text:span text:style-name="T53">: </text:span><text:span text:style-name="T55">"FH"</text:span><text:span text:style-name="T53">,</text:span></text:p>
            <text:p text:style-name="P156"><text:span text:style-name="T53"><text:s text:c="6"/></text:span><text:span text:style-name="T54">"cp_Famille"</text:span><text:span text:style-name="T53">: </text:span><text:span text:style-name="T55">null</text:span><text:span text:style-name="T53">,</text:span></text:p>
            <text:p text:style-name="P156"><text:span text:style-name="T53"><text:s text:c="6"/></text:span><text:span text:style-name="T54">"ville_Famille"</text:span><text:span text:style-name="T53">: </text:span><text:span text:style-name="T55">null</text:span><text:span text:style-name="T53">,</text:span></text:p>
            <text:p text:style-name="P156"><text:span text:style-name="T53"><text:s text:c="6"/></text:span><text:span text:style-name="T54">"adresse_Famille"</text:span><text:span text:style-name="T53">: </text:span><text:span text:style-name="T55">null</text:span><text:span text:style-name="T53">,</text:span></text:p>
            <text:p text:style-name="P156"><text:span text:style-name="T53"><text:s text:c="6"/></text:span><text:span text:style-name="T54">"numFam"</text:span><text:span text:style-name="T53">: </text:span><text:span text:style-name="T55">"9998"</text:span><text:span text:style-name="T53">,</text:span></text:p>
            <text:p text:style-name="P156"><text:span text:style-name="T53"><text:s text:c="6"/></text:span><text:span text:style-name="T54">"prestations"</text:span><text:span text:style-name="T53">: {</text:span></text:p>
            <text:p text:style-name="P156"><text:span text:style-name="T53"><text:s text:c="8"/></text:span><text:span text:style-name="T54">"2026-02-27"</text:span><text:span text:style-name="T53">: [</text:span></text:p>
            <text:p text:style-name="P156"><text:span text:style-name="T53"><text:s text:c="10"/></text:span><text:span text:style-name="T55">"4h00"</text:span></text:p>
            <text:p text:style-name="P156"><text:span text:style-name="T53"><text:s text:c="8"/>]</text:span><text:span text:style-name="T57"/></text:p>
            <text:p text:style-name="P156"><text:span text:style-name="T53"><text:s text:c="6"/>},</text:span><text:span text:style-name="T57"/></text:p>
            <text:p text:style-name="P156"><text:span text:style-name="T53"><text:s text:c="6"/></text:span><text:span text:style-name="T54">"totalSecondes"</text:span><text:span text:style-name="T53">: </text:span><text:span text:style-name="T55">14400</text:span><text:span text:style-name="T53">,</text:span></text:p>
            <text:p text:style-name="P156"><text:span text:style-name="T53"><text:s text:c="6"/></text:span><text:span text:style-name="T54">"totalKm"</text:span><text:span text:style-name="T53">: </text:span><text:span text:style-name="T55">5</text:span></text:p>
            <text:p text:style-name="P156"><text:span text:style-name="T53"><text:s text:c="4"/>},</text:span><text:span text:style-name="T57"/></text:p>
            <text:p text:style-name="P156"><text:span text:style-name="T53"><text:s text:c="4"/>{</text:span><text:span text:style-name="T57"/></text:p>
            <text:p text:style-name="P156"><text:span text:style-name="T53"><text:s text:c="6"/></text:span><text:span text:style-name="T54">"nomFam"</text:span><text:span text:style-name="T53">: </text:span><text:span text:style-name="T55">"ROLLAND - EON"</text:span><text:span text:style-name="T53">,</text:span></text:p>
            <text:p text:style-name="P156"><text:span text:style-name="T53"><text:s text:c="6"/></text:span><text:span text:style-name="T54">"cp_Famille"</text:span><text:span text:style-name="T53">: </text:span><text:span text:style-name="T55">"35000"</text:span><text:span text:style-name="T53">,</text:span></text:p>
            <text:p text:style-name="P156"><text:span text:style-name="T53"><text:s text:c="6"/></text:span><text:span text:style-name="T54">"ville_Famille"</text:span><text:span text:style-name="T53">: </text:span><text:span text:style-name="T55">"Rennes"</text:span><text:span text:style-name="T53">,</text:span></text:p>
            <text:p text:style-name="P156"><text:span text:style-name="T53"><text:s text:c="6"/></text:span><text:span text:style-name="T54">"adresse_Famille"</text:span><text:span text:style-name="T53">: </text:span><text:span text:style-name="T55">"1, rue Saint Alphonse"</text:span><text:span text:style-name="T53">,</text:span></text:p>
            <text:p text:style-name="P156"><text:span text:style-name="T53"><text:s text:c="6"/></text:span><text:span text:style-name="T54">"numFam"</text:span><text:span text:style-name="T53">: </text:span><text:span text:style-name="T55">"M7724"</text:span><text:span text:style-name="T53">,</text:span></text:p>
            <text:p text:style-name="P156"><text:span text:style-name="T53"><text:s text:c="6"/></text:span><text:span text:style-name="T54">"prestations"</text:span><text:span text:style-name="T53">: {</text:span></text:p>
            <text:p text:style-name="P156"><text:span text:style-name="T53"><text:s text:c="8"/></text:span><text:span text:style-name="T54">"2026-02-26"</text:span><text:span text:style-name="T53">: [</text:span></text:p>
            <text:p text:style-name="P156"><text:span text:style-name="T53"><text:s text:c="10"/></text:span><text:span text:style-name="T55">"7h00"</text:span></text:p>
            <text:p text:style-name="P156"><text:span text:style-name="T53"><text:s text:c="8"/>]</text:span><text:span text:style-name="T57"/></text:p>
            <text:p text:style-name="P156"><text:span text:style-name="T53"><text:s text:c="6"/>},</text:span><text:span text:style-name="T57"/></text:p>
            <text:p text:style-name="P156"><text:span text:style-name="T53"><text:s text:c="6"/></text:span><text:span text:style-name="T54">"totalSecondes"</text:span><text:span text:style-name="T53">: </text:span><text:span text:style-name="T55">25200</text:span><text:span text:style-name="T53">,</text:span></text:p>
            <text:p text:style-name="P156"><text:span text:style-name="T53"><text:s text:c="6"/></text:span><text:span text:style-name="T54">"totalKm"</text:span><text:span text:style-name="T53">: </text:span><text:span text:style-name="T55">2</text:span></text:p>
            <text:p text:style-name="P156"><text:span text:style-name="T53"><text:s text:c="4"/>}</text:span><text:span text:style-name="T57"/></text:p>
            <text:p text:style-name="P156"><text:span text:style-name="T53"><text:s text:c="2"/>],</text:span><text:span text:style-name="T57"/></text:p>
            <text:p text:style-name="P156"><text:span text:style-name="T53"><text:s text:c="2"/></text:span><text:span text:style-name="T54">"signer"</text:span><text:span text:style-name="T53">: {</text:span></text:p>
            <text:p text:style-name="P156"><text:span text:style-name="T53"><text:s text:c="4"/></text:span><text:span text:style-name="T54">"etat"</text:span><text:span text:style-name="T53">: </text:span><text:span text:style-name="T55">true</text:span><text:span text:style-name="T53">,</text:span></text:p>
            <text:p text:style-name="P156"><text:span text:style-name="T53"><text:s text:c="4"/></text:span><text:span text:style-name="T54">"date"</text:span><text:span text:style-name="T53">: </text:span><text:span text:style-name="T55">"2026-02-26 11:26:28"</text:span><text:span text:style-name="T53">,</text:span></text:p>
            <text:p text:style-name="P156"><text:span text:style-name="T53"><text:s text:c="4"/></text:span><text:span text:style-name="T54">"nom"</text:span><text:span text:style-name="T53">: </text:span><text:span text:style-name="T55">"POMMEREUL"</text:span></text:p>
            <text:p text:style-name="P156"><text:span text:style-name="T53"><text:s text:c="2"/>},</text:span><text:span text:style-name="T57"/></text:p>
            <text:p text:style-name="P156"><text:span text:style-name="T53"><text:s text:c="2"/></text:span><text:span text:style-name="T54">"totaux"</text:span><text:span text:style-name="T53">: {</text:span></text:p>
            <text:p text:style-name="P156"><text:span text:style-name="T53"><text:s text:c="4"/></text:span><text:span text:style-name="T54">"heuresMoisSecondes"</text:span><text:span text:style-name="T53">: </text:span><text:span text:style-name="T55">39600</text:span><text:span text:style-name="T53">,</text:span></text:p>
            <text:p text:style-name="P156"><text:span text:style-name="T53"><text:s text:c="4"/></text:span><text:span text:style-name="T54">"kmMois"</text:span><text:span text:style-name="T53">: </text:span><text:span text:style-name="T55">7</text:span><text:span text:style-name="T53">,</text:span></text:p>
            <text:p text:style-name="P156"><text:span text:style-name="T53"><text:s text:c="4"/></text:span><text:span text:style-name="T54">"heureDehors"</text:span><text:span text:style-name="T53">: </text:span><text:span text:style-name="T55">null</text:span></text:p>
            <text:p text:style-name="P156"><text:span text:style-name="T53"><text:s text:c="2"/>}</text:span><text:span text:style-name="T57"/></text:p>
            <text:p text:style-name="P155">}]</text:p>
          </table:table-cell>
        </table:table-row>
      </table:table>
      <text:p text:style-name="P151"/>
      <text:h text:style-name="P158" text:outline-level="3"/>
      <text:h text:style-name="P159" text:outline-level="3"><text:bookmark-start text:name="__RefHeading___Toc13412_3350031955 Copie 2"/>api_ajout_heure_de_hors<text:bookmark-end text:name="__RefHeading___Toc13412_3350031955 Copie 2"/></text:h>
      <text:p text:style-name="P160"/>
      <text:p text:style-name="P161"><text:span text:style-name="T46">Methode</text:span> : POST</text:p>
      <text:p text:style-name="P161"><text:span text:style-name="T46">URL</text:span> : /api/intervenants/<text:span text:style-name="T47">{id}</text:span><text:span text:style-name="T64">/signer</text:span><text:span text:style-name="T47"><text:line-break/><text:tab/></text:span><text:span text:style-name="T48">{id}</text:span><text:span text:style-name="T47"> : </text:span><text:span text:style-name="T49">de l’intervenant</text:span></text:p>
      <text:p text:style-name="P162"><text:span text:style-name="T46">HTTP_CODE</text:span> : 200, <text:span text:style-name="T50">401</text:span></text:p>
      <text:p text:style-name="P162"/>
      <text:p text:style-name="P163"><text:span text:style-name="T46">Description </text:span>: <text:span text:style-name="T65">Permet d’ajouter des heures en dehors du travail</text:span>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64">POST</text:p>
          </table:table-cell>
        </table:table-row>
        <table:table-row>
          <table:table-cell table:style-name="Tableau9.A2" office:value-type="string">
            <text:p text:style-name="P165">[{</text:p>
            <text:p text:style-name="P166"><text:span text:style-name="T53"><text:tab/></text:span><text:span text:style-name="T54">"success"</text:span><text:span text:style-name="T53"> : </text:span><text:span text:style-name="T55">false</text:span><text:span text:style-name="T53">,</text:span></text:p>
            <text:p text:style-name="P166"><text:span text:style-name="T53"><text:tab/></text:span><text:span text:style-name="T54">"message"</text:span><text:span text:style-name="T53">: </text:span><text:span text:style-name="T55">"Info erreur"</text:span></text:p>
            <text:p text:style-name="P165">}]</text:p>
          </table:table-cell>
        </table:table-row>
      </table:table>
      <text:p text:style-name="P162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67">HTTP CODE</text:p>
          </table:table-cell>
          <table:table-cell table:style-name="Tableau10.B1" office:value-type="string">
            <text:p text:style-name="P167">Retour API</text:p>
          </table:table-cell>
        </table:table-row>
        <table:table-row>
          <table:table-cell table:style-name="Tableau10.A2" office:value-type="string">
            <text:p text:style-name="P168">401</text:p>
          </table:table-cell>
          <table:table-cell table:style-name="Tableau10.B2" office:value-type="string">
            <text:p text:style-name="P169">[{</text:p>
            <text:p text:style-name="P170"><text:span text:style-name="T53"><text:tab/></text:span><text:span text:style-name="T54">"success"</text:span><text:span text:style-name="T53"> : </text:span><text:span text:style-name="T55">false</text:span><text:span text:style-name="T53">,</text:span></text:p>
            <text:p text:style-name="P170"><text:span text:style-name="T53"><text:tab/></text:span><text:span text:style-name="T54">"message"</text:span><text:span text:style-name="T53">: </text:span><text:span text:style-name="T55">"Info erreur"</text:span></text:p>
            <text:p text:style-name="P169">}]</text:p>
          </table:table-cell>
        </table:table-row>
        <table:table-row>
          <table:table-cell table:style-name="Tableau10.A3" office:value-type="string">
            <text:p text:style-name="P171">200</text:p>
          </table:table-cell>
          <table:table-cell table:style-name="Tableau10.B3" office:value-type="string">
            <text:p text:style-name="P169">[{</text:p>
            <text:p text:style-name="P170"><text:span text:style-name="T53"><text:tab/></text:span><text:span text:style-name="T54">"success"</text:span><text:span text:style-name="T53"> : </text:span><text:span text:style-name="T58">true</text:span><text:span text:style-name="T53">,</text:span></text:p>
            <text:p text:style-name="P170"><text:span text:style-name="T53"><text:tab/></text:span><text:span text:style-name="T54">"message"</text:span><text:span text:style-name="T53">: </text:span><text:span text:style-name="T55">"Info </text:span><text:span text:style-name="T59">reussite</text:span><text:span text:style-name="T55">"</text:span></text:p>
            <text:p text:style-name="P169">}]</text:p>
          </table:table-cell>
        </table:table-row>
      </table:table>
      <text:p text:style-name="P162"/>
      <text:h text:style-name="P172" text:outline-level="3"/>
      <text:h text:style-name="P173" text:outline-level="3"><text:bookmark-start text:name="__RefHeading___Toc13412_3350031955 Copie 3"/>api_signer<text:bookmark-end text:name="__RefHeading___Toc13412_3350031955 Copie 3"/></text:h>
      <text:p text:style-name="P174"/>
      <text:p text:style-name="P175"><text:span text:style-name="T46">Methode</text:span> : <text:span text:style-name="T66">GET</text:span></text:p>
      <text:p text:style-name="P175"><text:span text:style-name="T46">URL</text:span> : /api/intervenants/horaire/ajouter/<text:span text:style-name="T47">{id}<text:line-break/><text:tab/></text:span><text:span text:style-name="T48">{id}</text:span><text:span text:style-name="T47"> : </text:span><text:span text:style-name="T49">de l’intervenant</text:span></text:p>
      <text:p text:style-name="P176"><text:span text:style-name="T46">HTTP_CODE</text:span> : 200, <text:span text:style-name="T50">401</text:span></text:p>
      <text:p text:style-name="P176"/>
      <text:p text:style-name="P177"><text:span text:style-name="T46">Description </text:span>: Permet <text:span text:style-name="T60">de modifier</text:span> <text:span text:style-name="T51">une </text:span><text:span text:style-name="T52">horaire d’intervention à </text:span><text:span text:style-name="T60">d’</text:span><text:span text:style-name="T52">un intervenant</text:span></text:p>
      <text:p text:style-name="P177"/>
      <text:p text:style-name="P178"><text:span text:style-name="T47">NOTE :</text:span> <text:span text:style-name="T67">Transformer cette requête en POST pour maintenir la cohérence de l’API</text:span>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79">GET</text:p>
          </table:table-cell>
        </table:table-row>
        <table:table-row>
          <table:table-cell table:style-name="Tableau11.A2" office:value-type="string">
            <text:p text:style-name="P180">/api/intervenants/${ID}/signer?type=${type}&amp;periode_fin=${periodeFin}</text:p>
            <text:p text:style-name="P180"/>
            <text:p text:style-name="P181">$type=MENA ou ENFA</text:p>
            <text:p text:style-name="P181">$perideFin</text:p>
          </table:table-cell>
        </table:table-row>
      </table:table>
      <text:p text:style-name="P176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82">HTTP CODE</text:p>
          </table:table-cell>
          <table:table-cell table:style-name="Tableau12.B1" office:value-type="string">
            <text:p text:style-name="P182">Retour API</text:p>
          </table:table-cell>
        </table:table-row>
        <table:table-row>
          <table:table-cell table:style-name="Tableau12.A2" office:value-type="string">
            <text:p text:style-name="P183">401</text:p>
          </table:table-cell>
          <table:table-cell table:style-name="Tableau12.B2" office:value-type="string">
            <text:p text:style-name="P184">[{</text:p>
            <text:p text:style-name="P185"><text:span text:style-name="T53"><text:tab/></text:span><text:span text:style-name="T54">"success"</text:span><text:span text:style-name="T53"> : </text:span><text:span text:style-name="T55">false</text:span><text:span text:style-name="T53">,</text:span></text:p>
            <text:p text:style-name="P185"><text:span text:style-name="T53"><text:tab/></text:span><text:span text:style-name="T54">"message"</text:span><text:span text:style-name="T53">: </text:span><text:span text:style-name="T55">"Info erreur"</text:span></text:p>
            <text:p text:style-name="P184">}]</text:p>
          </table:table-cell>
        </table:table-row>
        <table:table-row table:style-name="Tableau12.3">
          <table:table-cell table:style-name="Tableau12.A3" office:value-type="string">
            <text:p text:style-name="P186">200</text:p>
          </table:table-cell>
          <table:table-cell table:style-name="Tableau12.B3" office:value-type="string">
            <text:p text:style-name="P184">[{</text:p>
            <text:p text:style-name="P185"><text:span text:style-name="T53"><text:tab/></text:span><text:span text:style-name="T54">"success"</text:span><text:span text:style-name="T53"> : </text:span><text:span text:style-name="T58">true</text:span><text:span text:style-name="T53">,</text:span></text:p>
            <text:p text:style-name="P185"><text:span text:style-name="T53"><text:tab/></text:span><text:span text:style-name="T54">"message"</text:span><text:span text:style-name="T53">: </text:span><text:span text:style-name="T55">"Info </text:span><text:span text:style-name="T59">reussite</text:span><text:span text:style-name="T55">"</text:span></text:p>
            <text:p text:style-name="P184">}]</text:p>
          </table:table-cell>
        </table:table-row>
      </table:table>
      <text:p text:style-name="P176"/>
      <text:h text:style-name="P187" text:outline-level="2"/>
      <text:h text:style-name="P188" text:outline-level="2"><text:bookmark-start text:name="__RefHeading___Toc25013_3350031955"/>Login<text:bookmark-end text:name="__RefHeading___Toc25013_3350031955"/></text:h>
      <text:h text:style-name="P189" text:outline-level="3"><text:bookmark-start text:name="__RefHeading___Toc13412_3350031955 Copie 3 Copie 2"/>api_register<text:bookmark-end text:name="__RefHeading___Toc13412_3350031955 Copie 3 Copie 2"/></text:h>
      <text:p text:style-name="P190"/>
      <text:p text:style-name="P191"><text:span text:style-name="T46">Methode</text:span> : <text:span text:style-name="T66">GET</text:span></text:p>
      <text:p text:style-name="P191"><text:span text:style-name="T46">URL</text:span> : /api/register/</text:p>
      <text:p text:style-name="P192"><text:span text:style-name="T46">HTTP_CODE</text:span> : 200, <text:span text:style-name="T50">401</text:span></text:p>
      <text:p text:style-name="P192"/>
      <text:p text:style-name="P193"><text:span text:style-name="T46">Description </text:span>: <text:span text:style-name="T68">Permet de s’inscrire avec du code</text:span></text:p>
      <text:p text:style-name="P194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195">POST</text:p>
          </table:table-cell>
        </table:table-row>
        <table:table-row>
          <table:table-cell table:style-name="Tableau13.A2" office:value-type="string">
            <text:p text:style-name="P196">[{<text:span text:style-name="T57"/></text:p>
            <text:p text:style-name="P197"><text:span text:style-name="T53"><text:s text:c="2"/></text:span><text:span text:style-name="T54">"id"</text:span><text:span text:style-name="T53"> : </text:span><text:span text:style-name="T55">"MENA"</text:span><text:span text:style-name="T53">,</text:span></text:p>
            <text:p text:style-name="P197"><text:span text:style-name="T53"><text:s text:c="2"/></text:span><text:span text:style-name="T54">"password"</text:span><text:span text:style-name="T53"> : </text:span><text:span text:style-name="T55">"Info erreur"</text:span><text:span text:style-name="T53">,</text:span></text:p>
            <text:p text:style-name="P197"><text:span text:style-name="T53"><text:s text:c="2"/></text:span><text:span text:style-name="T54">"password2"</text:span><text:span text:style-name="T53"> : </text:span><text:span text:style-name="T55">"Info complementaire"</text:span></text:p>
            <text:p text:style-name="P196">}]</text:p>
          </table:table-cell>
        </table:table-row>
      </table:table>
      <text:p text:style-name="P192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98">HTTP CODE</text:p>
          </table:table-cell>
          <table:table-cell table:style-name="Tableau14.B1" office:value-type="string">
            <text:p text:style-name="P198">Retour API</text:p>
          </table:table-cell>
        </table:table-row>
        <table:table-row>
          <table:table-cell table:style-name="Tableau14.A2" office:value-type="string">
            <text:p text:style-name="P199">401</text:p>
          </table:table-cell>
          <table:table-cell table:style-name="Tableau14.B2" office:value-type="string">
            <text:p text:style-name="P200">[{<text:span text:style-name="T57"/></text:p>
            <text:p text:style-name="P201"><text:span text:style-name="T53"><text:s text:c="2"/></text:span><text:span text:style-name="T54">"success"</text:span><text:span text:style-name="T53"> : </text:span><text:span text:style-name="T55">"MENA"</text:span><text:span text:style-name="T53">,</text:span></text:p>
            <text:p text:style-name="P201"><text:span text:style-name="T53"><text:s text:c="2"/></text:span><text:span text:style-name="T54">"error"</text:span><text:span text:style-name="T53"> : </text:span><text:span text:style-name="T55">"Info erreur"</text:span><text:span text:style-name="T53">,</text:span></text:p>
            <text:p text:style-name="P201"><text:span text:style-name="T53"><text:s text:c="2"/></text:span><text:span text:style-name="T54">"type"</text:span><text:span text:style-name="T53">: </text:span><text:span text:style-name="T55">"INTER"</text:span><text:span text:style-name="T53"> </text:span><text:span text:style-name="T56">// INTER ou FAM</text:span></text:p>
            <text:p text:style-name="P200">}]</text:p>
          </table:table-cell>
        </table:table-row>
        <table:table-row table:style-name="Tableau14.3">
          <table:table-cell table:style-name="Tableau14.A3" office:value-type="string">
            <text:p text:style-name="P202">200</text:p>
          </table:table-cell>
          <table:table-cell table:style-name="Tableau14.B3" office:value-type="string">
            <text:p text:style-name="P203">[{</text:p>
            <text:p text:style-name="P204"><text:span text:style-name="T53"><text:s text:c="2"/></text:span><text:span text:style-name="T54">"success"</text:span><text:span text:style-name="T53"> : </text:span><text:span text:style-name="T55">"MENA"</text:span><text:span text:style-name="T53">,</text:span></text:p>
            <text:p text:style-name="P204"><text:span text:style-name="T53"><text:s text:c="2"/></text:span><text:span text:style-name="T54">"message"</text:span><text:span text:style-name="T53"> : </text:span><text:span text:style-name="T55">"Info complementaire"</text:span><text:span text:style-name="T53">, </text:span></text:p>
            <text:p text:style-name="P204"><text:span text:style-name="T53"><text:s text:c="2"/></text:span><text:span text:style-name="T54">"type"</text:span><text:span text:style-name="T53">: </text:span><text:span text:style-name="T55">"INTER"</text:span><text:span text:style-name="T53"> </text:span><text:span text:style-name="T56">// INTER ou FAM</text:span></text:p>
            <text:p text:style-name="P203">}]</text:p>
          </table:table-cell>
        </table:table-row>
      </table:table>
      <text:p text:style-name="P192"/>
      <text:h text:style-name="P205" text:outline-level="2"/>
      <text:h text:style-name="P206" text:outline-level="2"><text:bookmark-start text:name="__RefHeading___Toc25013_3350031955 Copie 1"/>SettingsController<text:bookmark-end text:name="__RefHeading___Toc25013_3350031955 Copie 1"/></text:h>
      <text:h text:style-name="P207" text:outline-level="3"><text:bookmark-start text:name="__RefHeading___Toc13412_3350031955 Copie 3 Copie 2 Copie 1"/>change_password_settings<text:bookmark-end text:name="__RefHeading___Toc13412_3350031955 Copie 3 Copie 2 Copie 1"/></text:h>
      <text:p text:style-name="P208"/>
      <text:p text:style-name="P209"><text:span text:style-name="T46">Methode</text:span> : <text:span text:style-name="T69">POST</text:span></text:p>
      <text:p text:style-name="P209"><text:span text:style-name="T46">URL</text:span> : /api/register/</text:p>
      <text:p text:style-name="P210"><text:span text:style-name="T46">HTTP_CODE</text:span> : 200, <text:span text:style-name="T50">401</text:span></text:p>
      <text:p text:style-name="P210"/>
      <text:p text:style-name="P211"><text:span text:style-name="T46">Description </text:span>: <text:span text:style-name="T69">Permet de changer le mot de passe d’un intervenant</text:span></text:p>
      <text:p text:style-name="P212"/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13">POST</text:p>
          </table:table-cell>
        </table:table-row>
        <table:table-row>
          <table:table-cell table:style-name="Tableau15.A2" office:value-type="string">
            <text:p text:style-name="P214">[{</text:p>
            <text:p text:style-name="P215"><text:span text:style-name="T53"><text:s text:c="2"/></text:span><text:span text:style-name="T54">"id"</text:span><text:span text:style-name="T53"> : </text:span><text:span text:style-name="T55">"MENA"</text:span><text:span text:style-name="T53">,</text:span></text:p>
            <text:p text:style-name="P215"><text:span text:style-name="T53"><text:s text:c="2"/></text:span><text:span text:style-name="T54">"password"</text:span><text:span text:style-name="T53"> : </text:span><text:span text:style-name="T55">"Info erreur"</text:span><text:span text:style-name="T53">,</text:span></text:p>
            <text:p text:style-name="P215"><text:span text:style-name="T53"><text:s text:c="2"/></text:span><text:span text:style-name="T54">"password2"</text:span><text:span text:style-name="T53"> : </text:span><text:span text:style-name="T55">"Info complementaire"</text:span></text:p>
            <text:p text:style-name="P214">}]</text:p>
          </table:table-cell>
        </table:table-row>
      </table:table>
      <text:p text:style-name="P210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216">HTTP CODE</text:p>
          </table:table-cell>
          <table:table-cell table:style-name="Tableau16.B1" office:value-type="string">
            <text:p text:style-name="P216">Retour API</text:p>
          </table:table-cell>
        </table:table-row>
        <table:table-row>
          <table:table-cell table:style-name="Tableau16.A2" office:value-type="string">
            <text:p text:style-name="P217">401</text:p>
          </table:table-cell>
          <table:table-cell table:style-name="Tableau16.B2" office:value-type="string">
            <text:p text:style-name="P218">[{</text:p>
            <text:p text:style-name="P219"><text:span text:style-name="T53"><text:s text:c="2"/></text:span><text:span text:style-name="T54">"success"</text:span><text:span text:style-name="T53"> : </text:span><text:span text:style-name="T55">"MENA"</text:span><text:span text:style-name="T53">,</text:span></text:p>
            <text:p text:style-name="P219"><text:span text:style-name="T53"><text:s text:c="2"/></text:span><text:span text:style-name="T54">"error"</text:span><text:span text:style-name="T53"> : </text:span><text:span text:style-name="T55">"Info erreur"</text:span><text:span text:style-name="T53">,</text:span></text:p>
            <text:p text:style-name="P219"><text:span text:style-name="T53"><text:s text:c="2"/></text:span><text:span text:style-name="T54">"type"</text:span><text:span text:style-name="T53">: </text:span><text:span text:style-name="T55">"INTER"</text:span><text:span text:style-name="T53"> </text:span><text:span text:style-name="T56">// INTER ou FAM</text:span></text:p>
            <text:p text:style-name="P218">}]</text:p>
          </table:table-cell>
        </table:table-row>
        <table:table-row table:style-name="Tableau16.3">
          <table:table-cell table:style-name="Tableau16.A3" office:value-type="string">
            <text:p text:style-name="P220">200</text:p>
          </table:table-cell>
          <table:table-cell table:style-name="Tableau16.B3" office:value-type="string">
            <text:p text:style-name="P218">[{</text:p>
            <text:p text:style-name="P219"><text:span text:style-name="T53"><text:s text:c="2"/></text:span><text:span text:style-name="T54">"success"</text:span><text:span text:style-name="T53"> : </text:span><text:span text:style-name="T55">"MENA"</text:span><text:span text:style-name="T53">,</text:span></text:p>
            <text:p text:style-name="P219"><text:span text:style-name="T53"><text:s text:c="2"/></text:span><text:span text:style-name="T54">"message"</text:span><text:span text:style-name="T53"> : </text:span><text:span text:style-name="T55">"Info complementaire"</text:span><text:span text:style-name="T53">, </text:span></text:p>
            <text:p text:style-name="P219"><text:span text:style-name="T53"><text:s text:c="2"/></text:span><text:span text:style-name="T54">"type"</text:span><text:span text:style-name="T53">: </text:span><text:span text:style-name="T55">"INTER"</text:span><text:span text:style-name="T53"> </text:span><text:span text:style-name="T56">// INTER ou FAM</text:span></text:p>
            <text:p text:style-name="P218">}]</text:p>
          </table:table-cell>
        </table:table-row>
      </table:table>
      <text:p text:style-name="P210"/>
      <text:h text:style-name="P221" text:outline-level="1"><text:bookmark-start text:name="__RefHeading___Toc4755_2105714543"/>Podman<text:bookmark-end text:name="__RefHeading___Toc4755_2105714543"/></text:h>
      <text:p text:style-name="P222"><text:bookmark-start text:name="__RefHeading___Toc4757_2105714543"/><text:span text:style-name="T54">version</text:span><text:span text:style-name="T53">: </text:span><text:span text:style-name="T55">"3.9"</text:span><text:bookmark-end text:name="__RefHeading___Toc4757_2105714543"/></text:p>
      <text:p text:style-name="P223"/>
      <text:p text:style-name="P222"><text:bookmark-start text:name="__RefHeading___Toc4759_2105714543"/><text:span text:style-name="T54">services</text:span><text:span text:style-name="T53">:</text:span><text:bookmark-end text:name="__RefHeading___Toc4759_2105714543"/></text:p>
      <text:p text:style-name="P222"><text:bookmark-start text:name="__RefHeading___Toc4761_2105714543"/><text:span text:style-name="T53"><text:s text:c="2"/></text:span><text:span text:style-name="T54">php-apache</text:span><text:span text:style-name="T53">:</text:span><text:bookmark-end text:name="__RefHeading___Toc4761_2105714543"/></text:p>
      <text:p text:style-name="P222"><text:bookmark-start text:name="__RefHeading___Toc4763_2105714543"/><text:span text:style-name="T53"><text:s text:c="4"/></text:span><text:span text:style-name="T54">build</text:span><text:span text:style-name="T53">:</text:span><text:bookmark-end text:name="__RefHeading___Toc4763_2105714543"/></text:p>
      <text:p text:style-name="P222"><text:bookmark-start text:name="__RefHeading___Toc4765_2105714543"/><text:span text:style-name="T53"><text:s text:c="6"/></text:span><text:span text:style-name="T54">context</text:span><text:span text:style-name="T53">: </text:span>.<text:bookmark-end text:name="__RefHeading___Toc4765_2105714543"/></text:p>
      <text:p text:style-name="P222"><text:bookmark-start text:name="__RefHeading___Toc4767_2105714543"/><text:span text:style-name="T53"><text:s text:c="6"/></text:span><text:span text:style-name="T54">dockerfile</text:span><text:span text:style-name="T53">: </text:span>docker/container/symphony/Dockerfile<text:bookmark-end text:name="__RefHeading___Toc4767_2105714543"/></text:p>
      <text:p text:style-name="P222"><text:bookmark-start text:name="__RefHeading___Toc4769_2105714543"/><text:span text:style-name="T53"><text:s text:c="4"/></text:span><text:span text:style-name="T54">container_name</text:span><text:span text:style-name="T53">: </text:span>chaudoudoux_php<text:bookmark-end text:name="__RefHeading___Toc4769_2105714543"/></text:p>
      <text:p text:style-name="P222"><text:bookmark-start text:name="__RefHeading___Toc4771_2105714543"/><text:span text:style-name="T53"><text:s text:c="4"/></text:span><text:span text:style-name="T54">ports</text:span><text:span text:style-name="T53">:</text:span><text:bookmark-end text:name="__RefHeading___Toc4771_2105714543"/></text:p>
      <text:p text:style-name="P222"><text:bookmark-start text:name="__RefHeading___Toc4773_2105714543"/><text:span text:style-name="T53"><text:s text:c="6"/></text:span>-<text:span text:style-name="T53"> </text:span><text:span text:style-name="T55">"8032:80"</text:span><text:bookmark-end text:name="__RefHeading___Toc4773_2105714543"/></text:p>
      <text:p text:style-name="P222"><text:bookmark-start text:name="__RefHeading___Toc4775_2105714543"/><text:span text:style-name="T53"><text:s text:c="4"/></text:span><text:span text:style-name="T54">volumes</text:span><text:span text:style-name="T53">:</text:span><text:bookmark-end text:name="__RefHeading___Toc4775_2105714543"/></text:p>
      <text:p text:style-name="P222"><text:bookmark-start text:name="__RefHeading___Toc4777_2105714543"/><text:span text:style-name="T53"><text:s text:c="6"/></text:span>-<text:span text:style-name="T53"> </text:span>./www/app-suivis-heures/:/var/www/html<text:bookmark-end text:name="__RefHeading___Toc4777_2105714543"/></text:p>
      <text:p text:style-name="P222"><text:bookmark-start text:name="__RefHeading___Toc4779_2105714543"/><text:span text:style-name="T53"><text:s text:c="6"/></text:span>-<text:span text:style-name="T53"> </text:span>./docker/conf/apache/:/etc/apache2/sites-available/<text:bookmark-end text:name="__RefHeading___Toc4779_2105714543"/></text:p>
      <text:p text:style-name="P222"><text:bookmark-start text:name="__RefHeading___Toc4781_2105714543"/><text:span text:style-name="T53"><text:s text:c="4"/></text:span><text:span text:style-name="T54">depends_on</text:span><text:span text:style-name="T53">:</text:span><text:bookmark-end text:name="__RefHeading___Toc4781_2105714543"/></text:p>
      <text:p text:style-name="P222"><text:bookmark-start text:name="__RefHeading___Toc4783_2105714543"/><text:span text:style-name="T53"><text:s text:c="6"/></text:span>-<text:span text:style-name="T53"> </text:span>db<text:bookmark-end text:name="__RefHeading___Toc4783_2105714543"/></text:p>
      <text:p text:style-name="P222"><text:bookmark-start text:name="__RefHeading___Toc4785_2105714543"/><text:span text:style-name="T53"><text:s text:c="4"/></text:span><text:span text:style-name="T54">environment</text:span><text:span text:style-name="T53">:</text:span><text:bookmark-end text:name="__RefHeading___Toc4785_2105714543"/></text:p>
      <text:p text:style-name="P222"><text:bookmark-start text:name="__RefHeading___Toc4787_2105714543"/><text:span text:style-name="T53"><text:s text:c="6"/></text:span><text:span text:style-name="T54">APACHE_RUN_USER</text:span><text:span text:style-name="T53">: </text:span>www-data<text:bookmark-end text:name="__RefHeading___Toc4787_2105714543"/></text:p>
      <text:p text:style-name="P222"><text:bookmark-start text:name="__RefHeading___Toc4789_2105714543"/><text:span text:style-name="T53"><text:s text:c="6"/></text:span><text:span text:style-name="T54">APACHE_RUN_GROUP</text:span><text:span text:style-name="T53">: </text:span>www-data<text:bookmark-end text:name="__RefHeading___Toc4789_2105714543"/></text:p>
      <text:p text:style-name="P222"><text:bookmark-start text:name="__RefHeading___Toc4791_2105714543"/><text:span text:style-name="T53"><text:s text:c="4"/></text:span><text:span text:style-name="T54">restart</text:span><text:span text:style-name="T53">: </text:span>always<text:bookmark-end text:name="__RefHeading___Toc4791_2105714543"/></text:p>
      <text:p text:style-name="P223"/>
      <text:p text:style-name="P222"><text:bookmark-start text:name="__RefHeading___Toc4793_2105714543"/><text:span text:style-name="T53"><text:s text:c="2"/></text:span><text:span text:style-name="T54">db</text:span><text:span text:style-name="T53">:</text:span><text:bookmark-end text:name="__RefHeading___Toc4793_2105714543"/></text:p>
      <text:p text:style-name="P222"><text:bookmark-start text:name="__RefHeading___Toc4795_2105714543"/><text:span text:style-name="T53"><text:s text:c="4"/></text:span><text:span text:style-name="T54">image</text:span><text:span text:style-name="T53">: </text:span>mariadb:12<text:bookmark-end text:name="__RefHeading___Toc4795_2105714543"/></text:p>
      <text:p text:style-name="P222"><text:bookmark-start text:name="__RefHeading___Toc4797_2105714543"/><text:span text:style-name="T53"><text:s text:c="4"/></text:span><text:span text:style-name="T54">container_name</text:span><text:span text:style-name="T53">: </text:span>chaudoudoux_mariadb<text:bookmark-end text:name="__RefHeading___Toc4797_2105714543"/></text:p>
      <text:p text:style-name="P222"><text:bookmark-start text:name="__RefHeading___Toc4799_2105714543"/><text:span text:style-name="T53"><text:s text:c="4"/></text:span><text:span text:style-name="T54">restart</text:span><text:span text:style-name="T53">: </text:span>always<text:bookmark-end text:name="__RefHeading___Toc4799_2105714543"/></text:p>
      <text:p text:style-name="P222"><text:bookmark-start text:name="__RefHeading___Toc4801_2105714543"/><text:span text:style-name="T53"><text:s text:c="4"/></text:span><text:span text:style-name="T54">ports</text:span><text:span text:style-name="T53">:</text:span><text:bookmark-end text:name="__RefHeading___Toc4801_2105714543"/></text:p>
      <text:p text:style-name="P222"><text:bookmark-start text:name="__RefHeading___Toc4803_2105714543"/><text:span text:style-name="T53"><text:s text:c="6"/></text:span>-<text:span text:style-name="T53"> </text:span>3307:3306<text:bookmark-end text:name="__RefHeading___Toc4803_2105714543"/></text:p>
      <text:p text:style-name="P222"><text:bookmark-start text:name="__RefHeading___Toc4805_2105714543"/><text:span text:style-name="T53"><text:s text:c="4"/></text:span><text:span text:style-name="T54">environment</text:span><text:span text:style-name="T53">:</text:span><text:bookmark-end text:name="__RefHeading___Toc4805_2105714543"/></text:p>
      <text:p text:style-name="P222"><text:bookmark-start text:name="__RefHeading___Toc4807_2105714543"/><text:span text:style-name="T53"><text:s text:c="6"/></text:span><text:span text:style-name="T54">MYSQL_ROOT_PASSWORD</text:span><text:span text:style-name="T53">: </text:span>root<text:bookmark-end text:name="__RefHeading___Toc4807_2105714543"/></text:p>
      <text:p text:style-name="P222"><text:bookmark-start text:name="__RefHeading___Toc4809_2105714543"/><text:span text:style-name="T53"><text:s text:c="6"/></text:span><text:span text:style-name="T54">MYSQL_DATABASE</text:span><text:span text:style-name="T53">: </text:span>bdchaudoudoux<text:bookmark-end text:name="__RefHeading___Toc4809_2105714543"/></text:p>
      <text:p text:style-name="P222"><text:bookmark-start text:name="__RefHeading___Toc4811_2105714543"/><text:soft-page-break/><text:span text:style-name="T53"><text:s text:c="6"/></text:span><text:span text:style-name="T54">MYSQL_USER</text:span><text:span text:style-name="T53">: </text:span>chaudoudoux<text:bookmark-end text:name="__RefHeading___Toc4811_2105714543"/></text:p>
      <text:p text:style-name="P222"><text:bookmark-start text:name="__RefHeading___Toc4813_2105714543"/><text:span text:style-name="T53"><text:s text:c="6"/></text:span><text:span text:style-name="T54">MYSQL_PASSWORD</text:span><text:span text:style-name="T53">: </text:span>root<text:bookmark-end text:name="__RefHeading___Toc4813_2105714543"/></text:p>
      <text:p text:style-name="P222"><text:bookmark-start text:name="__RefHeading___Toc4815_2105714543"/><text:span text:style-name="T53"><text:s text:c="4"/></text:span><text:span text:style-name="T54">volumes</text:span><text:span text:style-name="T53">:</text:span><text:bookmark-end text:name="__RefHeading___Toc4815_2105714543"/></text:p>
      <text:p text:style-name="P222"><text:bookmark-start text:name="__RefHeading___Toc4817_2105714543"/><text:span text:style-name="T53"><text:s text:c="6"/></text:span>-<text:span text:style-name="T53"> </text:span>db_data_chaudoudoux:/var/lib/mysql<text:bookmark-end text:name="__RefHeading___Toc4817_2105714543"/></text:p>
      <text:p text:style-name="P223"/>
      <text:p text:style-name="P222"><text:bookmark-start text:name="__RefHeading___Toc4819_2105714543"/><text:span text:style-name="T54">volumes</text:span><text:span text:style-name="T53">:</text:span><text:bookmark-end text:name="__RefHeading___Toc4819_2105714543"/></text:p>
      <text:p text:style-name="P222"><text:bookmark-start text:name="__RefHeading___Toc4821_2105714543"/><text:span text:style-name="T53"><text:s text:c="2"/></text:span><text:span text:style-name="T54">db_data_chaudoudoux</text:span><text:span text:style-name="T53">:</text:span><text:bookmark-end text:name="__RefHeading___Toc4821_2105714543"/></text:p>
      <text:h text:style-name="P17" text:outline-level="1"><text:bookmark-start text:name="__RefHeading___Toc4499_2105714543"/>Déploiement<text:bookmark-end text:name="__RefHeading___Toc4499_2105714543"/></text:h>
      <text:p text:style-name="Text_20_body"/>
      <text:h text:style-name="P224" text:outline-level="2"><text:bookmark-start text:name="__RefHeading___Toc4716_2105714543"/>Windows<text:bookmark-end text:name="__RefHeading___Toc4716_2105714543"/></text:h>
      <text:p text:style-name="P225">Déplacer les fichiers dans xamp.</text:p>
      <text:p text:style-name="P225">Avec un terminal installer les dépendances</text:p>
      <text:p text:style-name="P226"><text:span text:style-name="T53">composer install</text:span></text:p>
      <text:h text:style-name="Heading_20_2" text:outline-level="2" text:is-list-header="true"><text:bookmark-start text:name="__RefHeading___Toc4718_2105714543"/><text:line-break/>Linux<text:bookmark-end text:name="__RefHeading___Toc4718_2105714543"/></text:h>
      <text:p text:style-name="P227">Par défaut l’environnement est sous conteneur</text:p>
      <text:p text:style-name="P228">installer docker ou podman.</text:p>
      <text:p text:style-name="P228"/>
      <text:p text:style-name="P228"><text:span text:style-name="T70">Note</text:span><text:span text:style-name="T71"> : docker et podman on les mêmes commandes. Il suffit donc de remplacer toute les commande podman par docker.</text:span></text:p>
      <text:p text:style-name="P228"><text:span text:style-name="T70">Note</text:span><text:span text:style-name="T71"> : Le nom des containers peut changer faites attentions</text:span></text:p>
      <text:p text:style-name="P228"><text:line-break/><text:line-break/>Une fois l’un ou l’autre installer</text:p>
      <text:p text:style-name="P227">Avec un terminal aller avec à l’end<text:span text:style-name="T71">roit </text:span>ou vous voyez podman-compose (si vous utilisez docker renommer le en docker-compose)<text:line-break/><text:line-break/>podman-compose up -d</text:p>
      <text:p text:style-name="P227"/>
      <text:p text:style-name="P229">Il faut après créer la base.<text:line-break/>podman exec -it chaudoudoux_mariadb</text:p>
      <text:p text:style-name="P229">Copier les fichiers de la base de donner avec podman cp file bdd : path</text:p>
      <text:p text:style-name="P229"/>
      <text:p text:style-name="P229">Installer les dépendances symphony<text:line-break/><text:line-break/>podman exec -it chaudoudoux_php composer install</text:p>
      <text:p text:style-name="P230">Et voilà votre environnement conteneuriser est prêt</text:p>
      <text:p text:style-name="P231"/>
      <text:p text:style-name="P231"/>
      <text:h text:style-name="P232" text:outline-level="2" text:is-list-header="true"><text:bookmark-start text:name="__RefHeading___Toc4720_2105714543"/><text:soft-page-break/>Variable d’environnement<text:bookmark-end text:name="__RefHeading___Toc4720_2105714543"/></text:h>
      <text:p text:style-name="P233"><text:span text:style-name="T53"><text:line-break/></text:span><text:span text:style-name="T54">DEV_ENV</text:span><text:span text:style-name="T72">=</text:span><text:span text:style-name="T54">true</text:span></text:p>
      <text:p text:style-name="P234"><text:span text:style-name="T54">SECRET_KEY</text:span><text:span text:style-name="T72">=</text:span><text:span text:style-name="T53">7480ba10cece01e91403306fd4d14827624de2c6ec2e8cf21fd01ad96800cb3b</text:span></text:p>
      <text:p text:style-name="P235">## Nom de la base principal contenant les intervenants et les candidats</text:p>
      <text:p text:style-name="P234"><text:span text:style-name="T54">DB_NAME_PRINCIPAL</text:span><text:span text:style-name="T72">=</text:span><text:span text:style-name="T53">bdchaudoudoux</text:span></text:p>
      <text:p text:style-name="P234"><text:span text:style-name="T53"><text:s/></text:span><text:span text:style-name="T73">## Nom de la base secondaire contenant les données relatif à l’apli web (utilisateur, relever d’heure)</text:span></text:p>
      <text:p text:style-name="P234"><text:span text:style-name="T54">DB_NAME_SECONDAIRE</text:span><text:span text:style-name="T72">=</text:span><text:span text:style-name="T53">bdchaudoudoux_horaire</text:span></text:p>
      <text:p text:style-name="P235">## nom d’utilisateurs de la BDD</text:p>
      <text:p text:style-name="P234"><text:span text:style-name="T54">DB_USER</text:span><text:span text:style-name="T72">=</text:span><text:span text:style-name="T53">chaudoudoux</text:span></text:p>
      <text:p text:style-name="P235">## mot de passe de l’utilisateur de la BDD</text:p>
      <text:p text:style-name="P234"><text:span text:style-name="T54">DB_PASSWORD</text:span><text:span text:style-name="T72">=</text:span><text:span text:style-name="T53">root</text:span></text:p>
      <text:p text:style-name="P235">## Nom de domaine de la BDD</text:p>
      <text:p text:style-name="P236"><text:span text:style-name="T54">DB_HOST</text:span><text:span text:style-name="T72">=</text:span><text:span text:style-name="T53">chaudoudoux_mariadb <text:line-break/><text:line-break/></text:span><text:span text:style-name="T74">## </text:span><text:span text:style-name="T75">Permet de prévisualiser les vues en </text:span><text:span text:style-name="T76">tant qu'utilisateurs normale</text:span></text:p>
      <text:p text:style-name="P236"><text:span text:style-name="T54">MODE_NO_DEV</text:span><text:span text:style-name="T72">=</text:span><text:span text:style-name="T55">0</text:span></text:p>
      <text:p text:style-name="P237"/>
      <text:p text:style-name="P235">## Mode de developement</text:p>
      <text:p text:style-name="P234"><text:span text:style-name="T54">APP_ENV</text:span><text:span text:style-name="T72">=</text:span><text:span text:style-name="T53">dev</text:span></text:p>
      <text:p text:style-name="P234"><text:span text:style-name="T54">APP_SECRET</text:span><text:span text:style-name="T72">=</text:span></text:p>
      <text:p text:style-name="P234"><text:span text:style-name="T54">APP_SHARE_DIR</text:span><text:span text:style-name="T72">=</text:span><text:span text:style-name="T53">var/share</text:span></text:p>
      <text:p text:style-name="P234"/>
      <text:p text:style-name="P2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fr" fo:country="FR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fr" fo:country="FR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97f492" officeooo:paragraph-rsid="0097f49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RAVERS Mathéo – Documentation<text:tab/><text:tab/><text:bookmark-start text:name="PageNumWizard_FOOTER_Style de page par défaut14"/><text:page-number text:select-page="current">26</text:page-number><text:bookmark-end text:name="PageNumWizard_FOOTER_Style de page par défaut14"/>/<text:page-count>26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7T08:35:31.722068810</meta:creation-date>
    <dc:date>2026-03-13T15:43:29.686661446</dc:date>
    <meta:editing-duration>PT5H3M47S</meta:editing-duration>
    <meta:editing-cycles>205</meta:editing-cycles>
    <meta:generator>LibreOffice/26.2.1.2$Linux_X86_64 LibreOffice_project/4498df292cc7b696862cd17d793f3e8fd1382c8a</meta:generator>
    <meta:document-statistic meta:table-count="16" meta:image-count="4" meta:object-count="0" meta:page-count="26" meta:paragraph-count="680" meta:word-count="2269" meta:character-count="16698" meta:non-whitespace-character-count="13599"/>
  </office:meta>
</office:document-meta>
</file>